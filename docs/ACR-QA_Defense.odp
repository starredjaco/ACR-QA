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265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.026cm" svg:stroke-linecap="butt" draw:fill="solid" draw:fill-color="#c9a84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5.24cm" style:use-optimal-column-width="false"/>
    </style:style>
    <style:style style:name="ro1" style:family="table-row">
      <style:table-row-properties style:row-height="1.27cm" style:use-optimal-row-height="false"/>
    </style:style>
    <style:style style:name="ce1" style:family="table-cell">
      <loext:graphic-properties draw:fill="solid" draw:fill-color="#002654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solid" draw:fill-color="#c9a84c"/>
      <style:paragraph-properties fo:text-align="center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.212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.212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1.27cm" fo:margin-right="0cm" fo:margin-top="0cm" fo:margin-bottom="0.212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2654" loext:opacity="100%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7" style:family="text">
      <style:text-properties fo:font-variant="normal" fo:text-transform="none" fo:color="#1a1a1a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1e9e53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variant="normal" fo:text-transform="none" fo:color="#002654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1a1a1a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14pt" fo:letter-spacing="normal" fo:language="en" fo:country="US" fo:font-style="italic" style:text-underline-style="none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variant="normal" fo:text-transform="none" fo:color="#1a1a1a" loext:opacity="100%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fo:font-variant="normal" fo:text-transform="none" fo:color="#1e9e53" loext:opacity="100%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15" style:family="text">
      <style:text-properties fo:font-variant="normal" fo:text-transform="none" fo:color="#555f6b" loext:opacity="100%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1e9e53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18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c9a84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26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1a1a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1e9e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26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a1a1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1e9e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a1a1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1a1a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a1a1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555f6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1e9e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e9e5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26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e9e5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TextBox 1" draw:style-name="gr1" draw:text-style-name="P2" draw:layer="layout" svg:width="29.717cm" svg:height="4.397cm" svg:x="2.032cm" svg:y="5.588cm">
          <text:p text:style-name="P1"><text:span text:style-name="T1">ACR-QA</text:span></text:p>
          <text:p text:style-name="P1"><text:span text:style-name="T2">Automated Code Review &amp; Quality Assurance</text:span></text:p>
          <text:p text:style-name="P1"><text:span text:style-name="T3">The Trust Layer for AI-Written Code — exploit-verified, cryptographically attes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2" draw:layer="layout" svg:width="29.717cm" svg:height="2.11cm" svg:x="2.032cm" svg:y="13.462cm">
          <text:p text:style-name="P1"><text:span text:style-name="T4">Ahmed Mahmoud Abbas</text:span></text:p>
          <text:p text:style-name="P1"><text:span text:style-name="T3">Supervisor: Dr. Samy AbdelNabi</text:span></text:p>
          <text:p text:style-name="P1"><text:span text:style-name="T5">Faculty of Computer Science &amp; Engineering · CSE494 Graduation Project 2 ·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draw:custom-shape draw:name="TextBox 1" draw:style-name="gr4" draw:text-style-name="P5" draw:layer="layout" svg:width="30.733cm" svg:height="1.518cm" svg:x="1.524cm" svg:y="1.27cm">
          <text:p text:style-name="P4"><text:span text:style-name="T6">Presentation Out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6" draw:layer="layout" svg:width="5.587cm" svg:height="0.105cm" svg:x="1.524cm" svg:y="3.429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" draw:text-style-name="P8" draw:layer="layout" svg:width="30.479cm" svg:height="9.568cm" svg:x="1.778cm" svg:y="4.318cm">
          <text:p text:style-name="P7"><text:span text:style-name="T7">• </text:span><text:span text:style-name="T7">Introduction &amp; Problem Statement</text:span></text:p>
          <text:p text:style-name="P7"><text:span text:style-name="T7">• </text:span><text:span text:style-name="T7">Motivation &amp; Core Innovations</text:span></text:p>
          <text:p text:style-name="P7"><text:span text:style-name="T7">• </text:span><text:span text:style-name="T7">System Architecture</text:span></text:p>
          <text:p text:style-name="P7"><text:span text:style-name="T7">• </text:span><text:span text:style-name="T7">RAG Explanation Engine</text:span></text:p>
          <text:p text:style-name="P7"><text:span text:style-name="T7">• </text:span><text:span text:style-name="T7">Data Model &amp; Audit Trail</text:span></text:p>
          <text:p text:style-name="P7"><text:span text:style-name="T8">• </text:span><text:span text:style-name="T8">Evaluation &amp; Results</text:span></text:p>
          <text:p text:style-name="P7"><text:span text:style-name="T8">• </text:span><text:span text:style-name="T8">Live Demo</text:span></text:p>
          <text:p text:style-name="P7"><text:span text:style-name="T7">• </text:span><text:span text:style-name="T7">Implementation Status</text:span></text:p>
          <text:p text:style-name="P7"><text:span text:style-name="T7">• </text:span><text:span text:style-name="T7">Conclusion &amp; Future Work · Ques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">
        <draw:custom-shape draw:name="TextBox 1" draw:style-name="gr7" draw:text-style-name="P5" draw:layer="layout" svg:width="30.733cm" svg:height="1.518cm" svg:x="1.524cm" svg:y="1.27cm">
          <text:p text:style-name="P4"><text:span text:style-name="T6">Introduction: The Con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6" draw:layer="layout" svg:width="5.587cm" svg:height="0.105cm" svg:x="1.524cm" svg:y="3.429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8" draw:text-style-name="P8" draw:layer="layout" svg:width="30.479cm" svg:height="7.195cm" svg:x="1.778cm" svg:y="4.318cm">
          <text:p text:style-name="P7"><text:span text:style-name="T7">• </text:span><text:span text:style-name="T7">Code review is critical to software quality — but manual review is inconsistent, slow, error-prone</text:span></text:p>
          <text:p text:style-name="P7"><text:span text:style-name="T7">• </text:span><text:span text:style-name="T7">It doesn't scale: universities see 300+ PRs/semester; startups 100+ PRs/week</text:span></text:p>
          <text:p text:style-name="P7"><text:span text:style-name="T9">• </text:span><text:span text:style-name="T9">The market gap:</text:span></text:p>
          <text:p text:style-name="P9"><text:span text:style-name="T10">– </text:span><text:span text:style-name="T10">Enterprise tools (SonarQube, Coverity) cost $10k–50k/year</text:span></text:p>
          <text:p text:style-name="P9"><text:span text:style-name="T10">– </text:span><text:span text:style-name="T10">Cloud SaaS requires uploading proprietary code — violates security policy</text:span></text:p>
          <text:p text:style-name="P9"><text:span text:style-name="T10">– </text:span><text:span text:style-name="T10">AI explainers hallucinate — developers get burned once and stop trusting them</text:span></text:p>
          <text:p text:style-name="P7"><text:span text:style-name="T8">• </text:span><text:span text:style-name="T8">ACR-QA: self-hosted, multi-tool, AI-explained, exploit-verified — at $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>
        <draw:custom-shape draw:name="TextBox 1" draw:style-name="gr9" draw:text-style-name="P5" draw:layer="layout" svg:width="30.733cm" svg:height="1.518cm" svg:x="1.524cm" svg:y="1.27cm">
          <text:p text:style-name="P4"><text:span text:style-name="T6">Problem Stat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6" draw:layer="layout" svg:width="5.587cm" svg:height="0.105cm" svg:x="1.524cm" svg:y="3.429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0" draw:text-style-name="P8" draw:layer="layout" svg:width="30.479cm" svg:height="6.136cm" svg:x="1.778cm" svg:y="4.318cm">
          <text:p text:style-name="P7"><text:span text:style-name="T9">• </text:span><text:span text:style-name="T9">Quality variance</text:span></text:p>
          <text:p text:style-name="P9"><text:span text:style-name="T10">– </text:span><text:span text:style-name="T10">Reviewer expertise &amp; availability vary → vulnerabilities slip through</text:span></text:p>
          <text:p text:style-name="P7"><text:span text:style-name="T9">• </text:span><text:span text:style-name="T9">Cost barrier</text:span></text:p>
          <text:p text:style-name="P9"><text:span text:style-name="T10">– </text:span><text:span text:style-name="T10">Powerful tools are unaffordable; free tools lack context → small teams use nothing</text:span></text:p>
          <text:p text:style-name="P7"><text:span text:style-name="T9">• </text:span><text:span text:style-name="T9">The hallucination problem</text:span></text:p>
          <text:p text:style-name="P9"><text:span text:style-name="T10">– </text:span><text:span text:style-name="T10">LLMs invent plausible-but-wrong guidance → trust collapses, feedback igno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">
        <draw:custom-shape draw:name="TextBox 1" draw:style-name="gr11" draw:text-style-name="P5" draw:layer="layout" svg:width="30.733cm" svg:height="1.518cm" svg:x="1.524cm" svg:y="1.27cm">
          <text:p text:style-name="P4"><text:span text:style-name="T6">Motivation &amp; Core Innov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6" draw:layer="layout" svg:width="5.587cm" svg:height="0.105cm" svg:x="1.524cm" svg:y="3.429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2" draw:text-style-name="P8" draw:layer="layout" svg:width="30.479cm" svg:height="6.391cm" svg:x="1.778cm" svg:y="4.318cm">
          <text:p text:style-name="P7"><text:span text:style-name="T9">• </text:span><text:span text:style-name="T9">RAG-enhanced explanations — ground the AI in the actual rule definition; it cites, not guesses</text:span></text:p>
          <text:p text:style-name="P7"><text:span text:style-name="T9">• </text:span><text:span text:style-name="T9">Canonical findings schema — normalize 19 engines (Ruff, Semgrep, Bandit…) into one format</text:span></text:p>
          <text:p text:style-name="P7"><text:span text:style-name="T8">• </text:span><text:span text:style-name="T8">Confirmed Tier — a 4-gate stratum precise enough to auto-block a merge (96.4%)</text:span></text:p>
          <text:p text:style-name="P7"><text:span text:style-name="T8">• </text:span><text:span text:style-name="T8">Exploit verification — detonate a real payload in a Docker sandbox; not 'maybe', but proven</text:span></text:p>
          <text:p text:style-name="P7"><text:span text:style-name="T9">• </text:span><text:span text:style-name="T9">On-premises — Docker Compose, zero cloud, zero recurring cost, full data privacy</text:span></text:p>
          <text:p text:style-name="P7"><text:span text:style-name="T9">• </text:span><text:span text:style-name="T9">Cryptographic attestation — every scan ECDSA-signed + SLSA L3 proven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ank">
        <draw:custom-shape draw:name="TextBox 1" draw:style-name="gr13" draw:text-style-name="P5" draw:layer="layout" svg:width="30.733cm" svg:height="2.11cm" svg:x="1.524cm" svg:y="1.27cm">
          <text:p text:style-name="P4"><text:span text:style-name="T6">System Architecture</text:span></text:p>
          <text:p text:style-name="P4"><text:span text:style-name="T11">Python, JavaScript/TypeScript, and Go adapters implemen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6" draw:layer="layout" svg:width="5.587cm" svg:height="0.105cm" svg:x="1.524cm" svg:y="3.429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4" draw:text-style-name="P8" draw:layer="layout" svg:width="30.479cm" svg:height="8.297cm" svg:x="1.778cm" svg:y="4.318cm">
          <text:p text:style-name="P7"><text:span text:style-name="T7">• </text:span><text:span text:style-name="T7">Developer pushes code → webhook received; PR diff extracted, job enqueued (Redis)</text:span></text:p>
          <text:p text:style-name="P7"><text:span text:style-name="T7">• </text:span><text:span text:style-name="T7">Detection: language adapter runs the tool suite in parallel (Ruff, Semgrep, Bandit, Vulture, Radon, jscpd)</text:span></text:p>
          <text:p text:style-name="P7"><text:span text:style-name="T7">• </text:span><text:span text:style-name="T7">Normalization: every tool's JSON → one CanonicalFinding schema</text:span></text:p>
          <text:p text:style-name="P7"><text:span text:style-name="T7">• </text:span><text:span text:style-name="T7">Trust gates: confidence scoring → reachability + taint → Confirmed Tier → exploit verification</text:span></text:p>
          <text:p text:style-name="P7"><text:span text:style-name="T7">• </text:span><text:span text:style-name="T7">RAG engine: retrieve rule definition → generate grounded explanation → entropy-validate</text:span></text:p>
          <text:p text:style-name="P7"><text:span text:style-name="T7">• </text:span><text:span text:style-name="T7">Persist to PostgreSQL (full audit trail) → ECDSA-sign → post PR comments by severity</text:span></text:p>
          <text:p text:style-name="P7"><text:span text:style-name="T8">• </text:span><text:span text:style-name="T8">End to end: 30–90 seconds per P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>
        <draw:custom-shape draw:name="TextBox 1" draw:style-name="gr15" draw:text-style-name="P5" draw:layer="layout" svg:width="30.733cm" svg:height="1.518cm" svg:x="1.524cm" svg:y="1.27cm">
          <text:p text:style-name="P4"><text:span text:style-name="T6">RAG Explanation Eng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6" draw:layer="layout" svg:width="5.587cm" svg:height="0.105cm" svg:x="1.524cm" svg:y="3.429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6" draw:text-style-name="P8" draw:layer="layout" svg:width="30.479cm" svg:height="6.306cm" svg:x="1.778cm" svg:y="4.318cm">
          <text:p text:style-name="P7"><text:span text:style-name="T7">• </text:span><text:span text:style-name="T7">Problem: a raw LLM explains from memory → it hallucinates on obscure rules</text:span></text:p>
          <text:p text:style-name="P7"><text:span text:style-name="T9">• </text:span><text:span text:style-name="T9">Solution: retrieve the actual rule definition first, then prompt with rule + code context</text:span></text:p>
          <text:p text:style-name="P9"><text:span text:style-name="T10">– </text:span><text:span text:style-name="T10">"This function has 5 parameters. SOLID-001 says each is a responsibility — consider splitting."</text:span></text:p>
          <text:p text:style-name="P7"><text:span text:style-name="T8">• </text:span><text:span text:style-name="T8">Validate: did it cite the rule? Is it coherent? Entropy filter rejects 96% of hallucinated runs</text:span></text:p>
          <text:p text:style-name="P7"><text:span text:style-name="T7">• </text:span><text:span text:style-name="T7">Fallback: deterministic template if the API is down or validation fails — never a blank, never a lie</text:span></text:p>
          <text:p text:style-name="P7"><text:span text:style-name="T9">• </text:span><text:span text:style-name="T9">This grounding is why the explanations are trustworth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">
        <draw:custom-shape draw:name="TextBox 1" draw:style-name="gr17" draw:text-style-name="P5" draw:layer="layout" svg:width="30.733cm" svg:height="1.518cm" svg:x="1.524cm" svg:y="1.27cm">
          <text:p text:style-name="P4"><text:span text:style-name="T6">Data Model &amp; Audit Tra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6" draw:layer="layout" svg:width="5.587cm" svg:height="0.105cm" svg:x="1.524cm" svg:y="3.429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8" draw:text-style-name="P8" draw:layer="layout" svg:width="30.479cm" svg:height="5.077cm" svg:x="1.778cm" svg:y="4.318cm">
          <text:p text:style-name="P7"><text:span text:style-name="T7">• </text:span><text:span text:style-name="T7">Every decision is logged — full provenance from raw tool output to signed verdict</text:span></text:p>
          <text:p text:style-name="P9"><text:span text:style-name="T10">– </text:span><text:span text:style-name="T10">CanonicalFinding is the single contract every engine reads and writes</text:span></text:p>
          <text:p text:style-name="P9"><text:span text:style-name="T10">– </text:span><text:span text:style-name="T10">Raw tool output, LLM prompt/response/cost, reachability &amp; exploit results — all stored</text:span></text:p>
          <text:p text:style-name="P9"><text:span text:style-name="T10">– </text:span><text:span text:style-name="T10">If a finding is disputed, the whole pipeline is auditable; feedback tunes thresholds</text:span></text:p>
          <text:p text:style-name="P7"><text:span text:style-name="T9">• </text:span><text:span text:style-name="T9">PostgreSQL + 20 migrations; each scan anchored by an ECDSA-P256 + Dilithium3 signa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ank">
        <draw:custom-shape draw:name="TextBox 1" draw:style-name="gr19" draw:text-style-name="P5" draw:layer="layout" svg:width="30.733cm" svg:height="2.11cm" svg:x="1.524cm" svg:y="1.27cm">
          <text:p text:style-name="P4"><text:span text:style-name="T6">Evaluation &amp; Results</text:span></text:p>
          <text:p text:style-name="P4"><text:span text:style-name="T11">Not just built — measured on adversarial corpora, against the standard to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6" draw:layer="layout" svg:width="5.587cm" svg:height="0.105cm" svg:x="1.524cm" svg:y="3.429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30.479cm" svg:height="8.889cm" svg:x="1.778cm" svg:y="4.699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4"><text:span text:style-name="T12">What we measured</text:span></text:p>
              </table:table-cell>
              <table:table-cell>
                <text:p text:style-name="P4"><text:span text:style-name="T12">Result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13">Confirmed-Tier precision (auto-block stratum)</text:span></text:p>
              </table:table-cell>
              <table:table-cell>
                <text:p text:style-name="P4"><text:span text:style-name="T14">96.4% <text:s/>(CI 90.9–100%)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13">CVE recall (pre-registered battery)</text:span></text:p>
              </table:table-cell>
              <table:table-cell>
                <text:p text:style-name="P4"><text:span text:style-name="T14">100% — 8/8 detectable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13">Head-to-head F1</text:span></text:p>
              </table:table-cell>
              <table:table-cell>
                <text:p text:style-name="P4"><text:span text:style-name="T14">98.2% vs Semgrep 45.7% / Bandit 21.8%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13">OWASP Top 10 coverage</text:span></text:p>
              </table:table-cell>
              <table:table-cell>
                <text:p text:style-name="P4"><text:span text:style-name="T14">9 / 10 categories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13">RealVuln 2026 leaderboard</text:span></text:p>
              </table:table-cell>
              <table:table-cell>
                <text:p text:style-name="P4"><text:span text:style-name="T14">25.1% — beats Semgrep/Snyk/SonarQube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13">Test suite / CORE coverage</text:span></text:p>
              </table:table-cell>
              <table:table-cell>
                <text:p text:style-name="P4"><text:span text:style-name="T14">3,017 tests · 88%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4" draw:style-name="gr20" draw:text-style-name="P5" draw:layer="layout" svg:width="30.733cm" svg:height="0.714cm" svg:x="1.524cm" svg:y="17.653cm">
          <text:p text:style-name="P4"><text:span text:style-name="T15">Two corpora · pre-registered methodology · Wilson CIs · external Bandit gate (non-tautologic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">
        <draw:custom-shape draw:name="TextBox 1" draw:style-name="gr21" draw:text-style-name="P5" draw:layer="layout" svg:width="30.733cm" svg:height="1.518cm" svg:x="1.524cm" svg:y="1.27cm">
          <text:p text:style-name="P4"><text:span text:style-name="T6">Why You Can Trust the Numb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6" draw:layer="layout" svg:width="5.587cm" svg:height="0.105cm" svg:x="1.524cm" svg:y="3.429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2" draw:text-style-name="P8" draw:layer="layout" svg:width="30.479cm" svg:height="7.11cm" svg:x="1.778cm" svg:y="4.318cm">
          <text:p text:style-name="P7"><text:span text:style-name="T9">• </text:span><text:span text:style-name="T9">We separated detection from trust</text:span></text:p>
          <text:p text:style-name="P9"><text:span text:style-name="T10">– </text:span><text:span text:style-name="T10">Most tools emit 30–70% false positives. The Confirmed Tier hits 96.4% — enough to auto-block.</text:span></text:p>
          <text:p text:style-name="P7"><text:span text:style-name="T8">• </text:span><text:span text:style-name="T8">We don't claim a vulnerability — we detonate it</text:span></text:p>
          <text:p text:style-name="P9"><text:span text:style-name="T10">– </text:span><text:span text:style-name="T10">Real payloads in a Docker sandbox: SQLi ' OR 1=1, SSTI {{7*7}}→49, command injection</text:span></text:p>
          <text:p text:style-name="P9"><text:span text:style-name="T16">– </text:span><text:span text:style-name="T16">Verified live: SQLi + SSTI detonate; safe code correctly does NOT (no false detonation)</text:span></text:p>
          <text:p text:style-name="P7"><text:span text:style-name="T9">• </text:span><text:span text:style-name="T9">Every result is signed</text:span></text:p>
          <text:p text:style-name="P9"><text:span text:style-name="T10">– </text:span><text:span text:style-name="T10">ECDSA-P256 + Sigstore Rekor + SLSA L3 — an auditor verifies in one com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>
        <draw:custom-shape draw:name="TextBox 1" draw:style-name="gr23" draw:text-style-name="P2" draw:layer="layout" svg:width="29.717cm" svg:height="2.958cm" svg:x="2.032cm" svg:y="7.112cm">
          <text:p text:style-name="P1"><text:span text:style-name="T17">Live Demo</text:span></text:p>
          <text:p text:style-name="P1"><text:span text:style-name="T18">ACR-QA in action — real repos, real findings, real explo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ank">
        <draw:custom-shape draw:name="TextBox 1" draw:style-name="gr24" draw:text-style-name="P5" draw:layer="layout" svg:width="30.733cm" svg:height="1.518cm" svg:x="1.524cm" svg:y="1.27cm">
          <text:p text:style-name="P4"><text:span text:style-name="T6">Implementation Stat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6" draw:layer="layout" svg:width="5.587cm" svg:height="0.105cm" svg:x="1.524cm" svg:y="3.429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5" draw:text-style-name="P8" draw:layer="layout" svg:width="30.479cm" svg:height="6.391cm" svg:x="1.778cm" svg:y="4.318cm">
          <text:p text:style-name="P7"><text:span text:style-name="T9">• </text:span><text:span text:style-name="T9">19 analysis engines across detection, scoring, RAG, reachability, taint, attestation</text:span></text:p>
          <text:p text:style-name="P7"><text:span text:style-name="T7">• </text:span><text:span text:style-name="T7">Python, JavaScript/TypeScript, Go adapters; PHP/Java via Semgrep generic rules</text:span></text:p>
          <text:p text:style-name="P7"><text:span text:style-name="T7">• </text:span><text:span text:style-name="T7">52-endpoint FastAPI service + React 18 / TypeScript dashboard (live SSE progress)</text:span></text:p>
          <text:p text:style-name="P7"><text:span text:style-name="T7">• </text:span><text:span text:style-name="T7">3,017 tests, 88% CORE coverage; Docker Compose, Helm, Terraform, K8s operator</text:span></text:p>
          <text:p text:style-name="P7"><text:span text:style-name="T7">• </text:span><text:span text:style-name="T7">Exploit verification across 13 categories; CBoM with NIST PQC classification</text:span></text:p>
          <text:p text:style-name="P7"><text:span text:style-name="T8">• </text:span><text:span text:style-name="T8">Shipped as acrqa==5.0.0rc2 — self-hosted, zero recurring c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ank">
        <draw:custom-shape draw:name="TextBox 1" draw:style-name="gr26" draw:text-style-name="P5" draw:layer="layout" svg:width="30.733cm" svg:height="1.518cm" svg:x="1.524cm" svg:y="1.27cm">
          <text:p text:style-name="P4"><text:span text:style-name="T6">Conclusion &amp; Future 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6" draw:layer="layout" svg:width="5.587cm" svg:height="0.105cm" svg:x="1.524cm" svg:y="3.429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7" draw:text-style-name="P8" draw:layer="layout" svg:width="30.479cm" svg:height="6.136cm" svg:x="1.778cm" svg:y="4.318cm">
          <text:p text:style-name="P7"><text:span text:style-name="T9">• </text:span><text:span text:style-name="T9">ACR-QA delivers trustworthy, multi-tool security analysis with verifiable exploit-proof at $0</text:span></text:p>
          <text:p text:style-name="P7"><text:span text:style-name="T8">• </text:span><text:span text:style-name="T8">96.4% Confirmed-Tier precision · 100% CVE recall · F1 98.2% · every result signed</text:span></text:p>
          <text:p text:style-name="P7"><text:span text:style-name="T9">• </text:span><text:span text:style-name="T9">Future work:</text:span></text:p>
          <text:p text:style-name="P9"><text:span text:style-name="T10">– </text:span><text:span text:style-name="T10">Inter-procedural taint analysis (est. +10–15pp injection recall)</text:span></text:p>
          <text:p text:style-name="P9"><text:span text:style-name="T10">– </text:span><text:span text:style-name="T10">Automatic pull-request generation via the GitHub API</text:span></text:p>
          <text:p text:style-name="P9"><text:span text:style-name="T10">– </text:span><text:span text:style-name="T10">PHP / Java / Rust dedicated adapters; parallel exploit-sandbox scale-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>
        <draw:custom-shape draw:name="TextBox 1" draw:style-name="gr28" draw:text-style-name="P2" draw:layer="layout" svg:width="29.717cm" svg:height="2.958cm" svg:x="2.032cm" svg:y="7.112cm">
          <text:p text:style-name="P1"><text:span text:style-name="T17">Thank You</text:span></text:p>
          <text:p text:style-name="P1"><text:span text:style-name="T18">Questio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 text:style-name="MP7"><presentation:footer/></text:p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Blank-title" draw:layer="backgroundobjects" svg:width="30.478cm" svg:height="3.18cm" svg:x="1.693cm" svg:y="0.76cm" presentation:class="title" presentation:placeholder="true">
        <draw:text-box/>
      </draw:frame>
      <draw:frame presentation:style-name="Blank-outline1" draw:layer="backgroundobjects" svg:width="30.478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escription>generated using python-pptx</dc:description>
    <dc:creator>Steve Canny</dc:creator>
    <meta:editing-cycles>1</meta:editing-cycles>
    <meta:creation-date>2013-01-27T09:14:16</meta:creation-date>
    <dc:date>2013-01-27T09:15:58</dc:date>
    <meta:editing-duration>PT1M</meta:editing-duration>
    <meta:generator>LibreOffice/7.3.7.2$Linux_X86_64 LibreOffice_project/30$Build-2</meta:generator>
    <meta:document-statistic meta:object-count="87"/>
    <meta:user-defined meta:name="AppVersion">14.0000</meta:user-defined>
    <meta:user-defined meta:name="PresentationFormat">On-screen Show (4:3)</meta:user-defined>
  </office:meta>
</office:document-meta>
</file>