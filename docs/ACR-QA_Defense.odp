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000000708696B7B98C1B217B9.png" manifest:media-type="image/png"/>
  <manifest:file-entry manifest:full-path="Pictures/TablePreview1.svm" manifest:media-type=""/>
  <manifest:file-entry manifest:full-path="Pictures/1000000100000AB0000006FF71A269ED226170C3.png" manifest:media-type="image/png"/>
  <manifest:file-entry manifest:full-path="Pictures/1000000000000B40000007089B13F9416310CB96.png" manifest:media-type="image/png"/>
  <manifest:file-entry manifest:full-path="Pictures/1000000100000E6F0000065BA1F7903575B7382E.png" manifest:media-type="image/png"/>
  <manifest:file-entry manifest:full-path="Pictures/1000000000000B400000070839972646A3A24F91.png" manifest:media-type="image/png"/>
  <manifest:file-entry manifest:full-path="Pictures/1000000000000B4000000708C4F51405ED82B8E6.png" manifest:media-type="image/png"/>
  <manifest:file-entry manifest:full-path="Pictures/100000000000075F000008A9999196B11E1D1CF2.png" manifest:media-type="image/png"/>
  <manifest:file-entry manifest:full-path="Pictures/10000000000000E1000000E0AFCD633B861B4D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265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1a3d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c9a8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.026cm" svg:stroke-linecap="butt" draw:fill="solid" draw:fill-color="#f4f6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0" style:family="graphic" style:parent-style-name="standard">
      <style:graphic-properties draw:stroke="none" svg:stroke-width="0.026cm" svg:stroke-linecap="butt" draw:fill="solid" draw:fill-color="#0026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svg:stroke-linecap="butt" draw:fill="solid" draw:fill-color="#dc36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2654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.026cm" svg:stroke-linecap="butt" draw:fill="solid" draw:fill-color="#001a3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.026cm" svg:stroke-linecap="butt" draw:fill="solid" draw:fill-color="#7b1f1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37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.026cm" svg:stroke-linecap="butt" draw:fill="solid" draw:fill-color="#0d543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0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.026cm" svg:stroke-linecap="butt" draw:fill="solid" draw:fill-color="#1a3a6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3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2.7cm" style:use-optimal-column-width="false"/>
    </style:style>
    <style:style style:name="co2" style:family="table-column">
      <style:table-column-properties style:column-width="4.445cm" style:use-optimal-column-width="false"/>
    </style:style>
    <style:style style:name="ro1" style:family="table-row">
      <style:table-row-properties style:row-height="1.693cm" style:use-optimal-row-height="false"/>
    </style:style>
    <style:style style:name="ro2" style:family="table-row">
      <style:table-row-properties style:row-height="1.694cm" style:use-optimal-row-height="false"/>
    </style:style>
    <style:style style:name="ce1" style:family="table-cell">
      <loext:graphic-properties draw:fill="solid" draw:fill-color="#00265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f7ef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c9a84c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98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4f6f9"/>
      <style:paragraph-properties fo:text-align="center" style:font-independent-line-spacing="true"/>
      <style:text-properties fo:font-size="18pt"/>
    </style:style>
    <style:style style:name="P12" style:family="paragraph">
      <loext:graphic-properties draw:fill="solid" draw:fill-color="#002654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dc3636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1.27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9" style:family="paragraph">
      <loext:graphic-properties draw:fill="solid" draw:fill-color="#001a3d"/>
      <style:paragraph-properties fo:text-align="center" style:font-independent-line-spacing="true"/>
      <style:text-properties fo:font-size="18pt"/>
    </style:style>
    <style:style style:name="P20" style:family="paragraph">
      <loext:graphic-properties draw:fill="solid" draw:fill-color="#7b1f1f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0d5430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1a3a6b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62pt" fo:letter-spacing="normal" fo:language="en" fo:country="US" fo:font-style="normal" style:text-underline-style="none" fo:font-weight="bold" fo:background-color="transparent" style:font-size-asian="62pt" style:font-style-asian="normal" style:font-weight-asian="bold" style:font-size-complex="62pt" style:font-style-complex="normal" style:font-weight-complex="bold"/>
    </style:style>
    <style:style style:name="T3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c8d2e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fo:font-variant="normal" fo:text-transform="none" fo:color="#9fb0c4" loext:opacity="100%" style:text-line-through-style="none" style:text-line-through-type="none" style:text-position="0% 100%" style:font-name="Calibri" fo:font-size="17pt" fo:letter-spacing="normal" fo:language="en" fo:country="US" fo:font-style="italic" style:text-underline-style="none" fo:font-weight="normal" fo:background-color="transparent" style:font-size-asian="17pt" style:font-style-asian="italic" style:font-weight-asian="normal" style:font-size-complex="17pt" style:font-style-complex="italic" style:font-weight-complex="normal"/>
    </style:style>
    <style:style style:name="T14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5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dc3636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1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23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variant="normal" fo:text-transform="none" fo:color="#5b6672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variant="normal" fo:text-transform="none" fo:color="#5b6672" loext:opacity="100%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font-variant="normal" fo:text-transform="none" fo:color="#d0e4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33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c2c8c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9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4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41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a8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8d2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fb0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41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dc36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141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5b6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d0e4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c2c8c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189e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571cm" svg:height="3.555cm" svg:x="15.418cm" svg:y="1.778cm">
          <draw:image xlink:href="Pictures/10000000000000E1000000E0AFCD633B861B4D86.png" xlink:type="simple" xlink:show="embed" xlink:actuate="onLoad" draw:mime-type="image/png">
            <text:p/>
          </draw:image>
          <svg:desc>ksiu-logo.png</svg:desc>
        </draw:frame>
        <draw:custom-shape draw:name="TextBox 3" draw:style-name="gr3" draw:text-style-name="P4" draw:layer="layout" svg:width="29.717cm" svg:height="4.481cm" svg:x="2.032cm" svg:y="6.35cm">
          <text:p text:style-name="P1"><text:span text:style-name="T2">ACR-QA</text:span></text:p>
          <text:p text:style-name="P1"><text:span text:style-name="T3">Automated Code Review &amp; Quality Assurance</text:span></text:p>
          <text:p text:style-name="P1"><text:span text:style-name="T4">The trust layer for AI-written code — exploit-verified, cryptographically atte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6" draw:layer="layout" svg:width="29.717cm" svg:height="2.788cm" svg:x="2.032cm" svg:y="13.97cm">
          <text:p text:style-name="P5"><text:span text:style-name="T5"/></text:p>
          <text:p text:style-name="P1"><text:span text:style-name="T6">Ahmed Mahmoud Abbas</text:span></text:p>
          <text:p text:style-name="P1"><text:span text:style-name="T7">Supervisor: Dr. Samy AbdelNabi</text:span></text:p>
          <text:p text:style-name="P1"><text:span text:style-name="T8">Faculty of Computer Science &amp; Engineering · CSE494 Graduation Project 2 ·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6" draw:text-style-name="P6" draw:layer="layout" svg:width="28.701cm" svg:height="9.418cm" svg:x="2.54cm" svg:y="3.81cm">
          <text:p text:style-name="P5"><text:span text:style-name="T9">AI now writes a third of new code.</text:span></text:p>
          <text:p text:style-name="P8"><text:span text:style-name="T10">And </text:span><text:span text:style-name="T11">45% of AI-written code ships a known flaw</text:span><text:span text:style-name="T10"> (Veracode '25) —</text:span></text:p>
          <text:p text:style-name="P5"><text:span text:style-name="T10">while vulnerabilities per codebase jumped </text:span><text:span text:style-name="T11">+107% in a year</text:span><text:span text:style-name="T10"> (Black Duck OSSRA '26).</text:span></text:p>
          <text:p text:style-name="P9"><text:span text:style-name="T12">Your scanner flags 1,900 issues. Which one breaches you?</text:span></text:p>
          <text:p text:style-name="P10"><text:span text:style-name="T13">Nobody can review that. So teams ship blind — or pay $50k/year and still don't trust the outpu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1" draw:style-name="gr7" draw:text-style-name="P6" draw:layer="layout" svg:width="30.733cm" svg:height="1.518cm" svg:x="1.524cm" svg:y="1.067cm">
          <text:p text:style-name="P5"><text:span text:style-name="T14">The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6" draw:layer="layout" svg:width="30.479cm" svg:height="0.841cm" svg:x="1.575cm" svg:y="3.404cm">
          <text:p text:style-name="P5"><text:span text:style-name="T15">Three reasons teams can't trust automated code review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9" draw:text-style-name="P11" draw:layer="layout" svg:width="10.032cm" svg:height="10.667cm" svg:x="1.524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10" draw:text-style-name="P12" draw:layer="layout" svg:width="10.032cm" svg:height="0.405cm" svg:x="1.524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6" draw:layer="layout" svg:width="8.762cm" svg:height="3.817cm" svg:x="2.159cm" svg:y="5.969cm">
          <text:p text:style-name="P5"><text:span text:style-name="T16">Quality variance</text:span></text:p>
          <text:p text:style-name="P13"><text:span text:style-name="T17">Manual review is inconsistent — expertise and attention vary. The SQL injection on line 47 slips through on the 50th PR of the da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9" draw:text-style-name="P11" draw:layer="layout" svg:width="10.032cm" svg:height="10.667cm" svg:x="12.065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8" draw:style-name="gr1" draw:text-style-name="P2" draw:layer="layout" svg:width="10.032cm" svg:height="0.405cm" svg:x="12.065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" draw:text-style-name="P6" draw:layer="layout" svg:width="8.762cm" svg:height="3.817cm" svg:x="12.7cm" svg:y="5.969cm">
          <text:p text:style-name="P5"><text:span text:style-name="T18">Cost barrier</text:span></text:p>
          <text:p text:style-name="P13"><text:span text:style-name="T17">Enterprise tools cost $10k–50k/year. Unaffordable for universities and startups — so they run a basic linter, or noth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9" draw:text-style-name="P11" draw:layer="layout" svg:width="10.032cm" svg:height="10.667cm" svg:x="22.606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1" draw:style-name="gr13" draw:text-style-name="P14" draw:layer="layout" svg:width="10.032cm" svg:height="0.405cm" svg:x="22.606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4" draw:text-style-name="P6" draw:layer="layout" svg:width="8.762cm" svg:height="3.225cm" svg:x="23.241cm" svg:y="5.969cm">
          <text:p text:style-name="P5"><text:span text:style-name="T19">Hallucination</text:span></text:p>
          <text:p text:style-name="P13"><text:span text:style-name="T17">AI explainers invent plausible-but-wrong guidance. A developer gets burned once and never trusts the tool aga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nk">
        <draw:custom-shape draw:name="TextBox 1" draw:style-name="gr15" draw:text-style-name="P6" draw:layer="layout" svg:width="30.733cm" svg:height="1.518cm" svg:x="1.524cm" svg:y="1.067cm">
          <text:p text:style-name="P5"><text:span text:style-name="T14">The Solution: ACR-Q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17" draw:layer="layout" svg:width="30.479cm" svg:height="7.231cm" svg:x="1.778cm" svg:y="4.699cm">
          <text:p text:style-name="P15"><text:span text:style-name="T20">● <text:s/></text:span><text:span text:style-name="T20">A trust layer on top of your scanners — answers one question at merge time:</text:span></text:p>
          <text:p text:style-name="P16"><text:span text:style-name="T21">– <text:s/></text:span><text:span text:style-name="T21">"Is this finding real enough to block automatically?"</text:span></text:p>
          <text:p text:style-name="P15"><text:span text:style-name="T22">● <text:s/></text:span><text:span text:style-name="T22">Two modes, one scan: Confirmed Tier (96.4% precision, auto-block) vs Full Output (91% recall, triage)</text:span></text:p>
          <text:p text:style-name="P15"><text:span text:style-name="T22">● <text:s/></text:span><text:span text:style-name="T22">RAG-grounded AI — cites the rule, entropy filter rejects hallucinated explanations</text:span></text:p>
          <text:p text:style-name="P15"><text:span text:style-name="T22">● <text:s/></text:span><text:span text:style-name="T22">Exploit verification — fires a real payload in an isolated Docker sandbox</text:span></text:p>
          <text:p text:style-name="P15"><text:span text:style-name="T22">● <text:s/></text:span><text:span text:style-name="T22">ECDSA-P256 + post-quantum attestation — every scan signed, tamper-evident</text:span></text:p>
          <text:p text:style-name="P15"><text:span text:style-name="T20">● <text:s/></text:span><text:span text:style-name="T20">Self-hosted · zero recurring cost · full data priv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ank">
        <draw:custom-shape draw:name="TextBox 1" draw:style-name="gr17" draw:text-style-name="P6" draw:layer="layout" svg:width="30.987cm" svg:height="1.265cm" svg:x="1.397cm" svg:y="0.559cm">
          <text:p text:style-name="P5"><text:span text:style-name="T23">System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8" draw:text-style-name="P6" draw:layer="layout" svg:width="30.479cm" svg:height="0.756cm" svg:x="1.448cm" svg:y="2.464cm">
          <text:p text:style-name="P5"><text:span text:style-name="T24">19 engines · 3 language adapters · 12-stage async pipeline · 52-endpoint Fast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11.457cm" svg:height="13.461cm" svg:x="11.204cm" svg:y="3.607cm">
          <draw:image xlink:href="Pictures/100000000000075F000008A9999196B11E1D1CF2.png" xlink:type="simple" xlink:show="embed" xlink:actuate="onLoad" draw:mime-type="image/png">
            <text:p/>
          </draw:image>
          <svg:desc>arch_overview.png</svg:desc>
        </draw:frame>
        <draw:custom-shape draw:name="TextBox 5" draw:style-name="gr19" draw:text-style-name="P6" draw:layer="layout" svg:width="30.987cm" svg:height="0.714cm" svg:x="1.397cm" svg:y="17.475cm">
          <text:p text:style-name="P5"><text:span text:style-name="T25">Push triggers a Celery worker: 12 tools run in parallel, every output normalised to CanonicalFinding, trust gates applied, results signed and persisted. End-to-end: 14–90 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ank">
        <draw:custom-shape draw:name="TextBox 1" draw:style-name="gr20" draw:text-style-name="P6" draw:layer="layout" svg:width="30.733cm" svg:height="1.518cm" svg:x="1.524cm" svg:y="1.067cm">
          <text:p text:style-name="P5"><text:span text:style-name="T14">Live Dashboard — Fleet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1" draw:text-style-name="P6" draw:layer="layout" svg:width="30.479cm" svg:height="0.841cm" svg:x="1.575cm" svg:y="3.404cm">
          <text:p text:style-name="P5"><text:span text:style-name="T15">Real scans on real repos — psf/requests · encode/httpx · FastAPI · Fl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18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C4F51405ED82B8E6.png" xlink:type="simple" xlink:show="embed" xlink:actuate="onLoad" draw:mime-type="image/png">
            <text:p/>
          </draw:image>
          <svg:desc>overview.png</svg:desc>
        </draw:frame>
        <draw:custom-shape draw:name="TextBox 6" draw:style-name="gr23" draw:text-style-name="P6" draw:layer="layout" svg:width="30.733cm" svg:height="0.756cm" svg:x="1.524cm" svg:y="17.653cm">
          <text:p text:style-name="P5"><text:span text:style-name="T26">Confirmed Tier tile fetches live from the API — never estimated. Trust Layer banner shows precision, recall, F1, and self-scan result in real ti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ank">
        <draw:custom-shape draw:name="TextBox 1" draw:style-name="gr24" draw:text-style-name="P6" draw:layer="layout" svg:width="30.987cm" svg:height="1.265cm" svg:x="1.397cm" svg:y="0.559cm">
          <text:p text:style-name="P5"><text:span text:style-name="T23">The Precision Funnel — From Noise to 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" draw:text-style-name="P6" draw:layer="layout" svg:width="30.479cm" svg:height="0.756cm" svg:x="1.448cm" svg:y="2.464cm">
          <text:p text:style-name="P5"><text:span text:style-name="T24">24-repo adversarial corpus · 1,942 raw findings → 55 Confirmed Tier · &gt;52 pp F₁ over Semgrep 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30.572cm" svg:height="13.461cm" svg:x="1.646cm" svg:y="3.607cm">
          <draw:image xlink:href="Pictures/1000000100000E6F0000065BA1F7903575B7382E.png" xlink:type="simple" xlink:show="embed" xlink:actuate="onLoad" draw:mime-type="image/png">
            <text:p/>
          </draw:image>
          <svg:desc>FUNNEL_SLIDE.png</svg:desc>
        </draw:frame>
        <draw:custom-shape draw:name="TextBox 5" draw:style-name="gr26" draw:text-style-name="P6" draw:layer="layout" svg:width="30.987cm" svg:height="0.714cm" svg:x="1.397cm" svg:y="17.475cm">
          <text:p text:style-name="P5"><text:span text:style-name="T25">Note: these numbers are the full evaluation corpus (24 repos). The live demo scans one app and produces proportionally fewer confirmed findings. Same filter — smaller inpu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ank">
        <draw:custom-shape draw:name="TextBox 1" draw:style-name="gr27" draw:text-style-name="P6" draw:layer="layout" svg:width="30.987cm" svg:height="1.265cm" svg:x="1.397cm" svg:y="0.559cm">
          <text:p text:style-name="P5"><text:span text:style-name="T23">RealVuln 2026 — Real-World Recall Leader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8" draw:text-style-name="P6" draw:layer="layout" svg:width="30.479cm" svg:height="0.756cm" svg:x="1.448cm" svg:y="2.464cm">
          <text:p text:style-name="P5"><text:span text:style-name="T24">22 real-world Python CVE apps · third-party ground truth (arXiv:2604.13764) · strict CWE+file+line±10 mat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0.564cm" svg:height="13.461cm" svg:x="6.65cm" svg:y="3.607cm">
          <draw:image xlink:href="Pictures/1000000100000AB0000006FF71A269ED226170C3.png" xlink:type="simple" xlink:show="embed" xlink:actuate="onLoad" draw:mime-type="image/png">
            <text:p/>
          </draw:image>
          <svg:desc>REALVULN_LEADERBOARD.png</svg:desc>
        </draw:frame>
        <draw:custom-shape draw:name="TextBox 5" draw:style-name="gr29" draw:text-style-name="P6" draw:layer="layout" svg:width="30.987cm" svg:height="0.714cm" svg:x="1.397cm" svg:y="17.475cm">
          <text:p text:style-name="P5"><text:span text:style-name="T25">ACR-QA Full Output: 25.1% beats Bandit (19.4%), Semgrep CE (17.5%), Snyk (17.4%), SonarQube (6.5%). +LLM augmented: 32.4%. ACR-QA detectable-subset recall: 37.8%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TextBox 1" draw:style-name="gr30" draw:text-style-name="P6" draw:layer="layout" svg:width="30.987cm" svg:height="1.349cm" svg:x="1.397cm" svg:y="0.559cm">
          <text:p text:style-name="P5"><text:span text:style-name="T27">Exploit Verification — Proven, Not Claim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1" draw:text-style-name="P6" draw:layer="layout" svg:width="30.479cm" svg:height="0.756cm" svg:x="1.448cm" svg:y="2.464cm">
          <text:p text:style-name="P5"><text:span text:style-name="T24">4-phase chain: detect → detonate → patch → re-detonate · ECDSA-signed bundle at every st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32" draw:text-style-name="P19" draw:layer="layout" svg:width="7.238cm" svg:height="11.429cm" svg:x="1.397cm" svg:y="3.86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1" draw:text-style-name="P2" draw:layer="layout" svg:width="7.238cm" svg:height="1.396cm" svg:x="1.397cm" svg:y="3.86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3" draw:text-style-name="P4" draw:layer="layout" svg:width="7.238cm" svg:height="0.882cm" svg:x="1.397cm" svg:y="4.155cm">
          <text:p text:style-name="P1"><text:span text:style-name="T28">Phas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4" draw:text-style-name="P4" draw:layer="layout" svg:width="6.628cm" svg:height="1.096cm" svg:x="1.702cm" svg:y="5.512cm">
          <text:p text:style-name="P1"><text:span text:style-name="T29">DET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5" draw:text-style-name="P18" draw:layer="layout" svg:width="6.476cm" svg:height="2.025cm" svg:x="1.778cm" svg:y="7.366cm">
          <text:p><text:span text:style-name="T30">Rule maps to exploit</text:span></text:p>
          <text:p><text:span text:style-name="T30">category: SQLi, CMDi,</text:span></text:p>
          <text:p text:style-name="P1"><text:span text:style-name="T30">SSTI — 13 categ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9" draw:style-name="gr1" draw:text-style-name="P2" draw:layer="layout" svg:width="0.405cm" svg:height="1.269cm" svg:x="8.712cm" svg:y="8.687cm">
          <text:p text:style-name="P1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ounded Rectangle 10" draw:style-name="gr36" draw:text-style-name="P20" draw:layer="layout" svg:width="7.238cm" svg:height="11.429cm" svg:x="9.195cm" svg:y="3.86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1" draw:style-name="gr1" draw:text-style-name="P2" draw:layer="layout" svg:width="7.238cm" svg:height="1.396cm" svg:x="9.195cm" svg:y="3.86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7" draw:text-style-name="P4" draw:layer="layout" svg:width="7.238cm" svg:height="0.882cm" svg:x="9.195cm" svg:y="4.155cm">
          <text:p text:style-name="P1"><text:span text:style-name="T28">Phas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8" draw:text-style-name="P4" draw:layer="layout" svg:width="6.628cm" svg:height="1.096cm" svg:x="9.5cm" svg:y="5.512cm">
          <text:p text:style-name="P1"><text:span text:style-name="T29">DETON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5" draw:text-style-name="P18" draw:layer="layout" svg:width="6.476cm" svg:height="2.617cm" svg:x="9.576cm" svg:y="7.366cm">
          <text:p><text:span text:style-name="T30">Docker sandbox fires</text:span></text:p>
          <text:p><text:span text:style-name="T30">real payload:</text:span></text:p>
          <text:p><text:span text:style-name="T30">' OR 1=1 · ;echo PWNED</text:span></text:p>
          <text:p text:style-name="P1"><text:span text:style-name="T30">{{7×7}}→4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5" draw:style-name="gr1" draw:text-style-name="P2" draw:layer="layout" svg:width="0.405cm" svg:height="1.269cm" svg:x="16.51cm" svg:y="8.687cm">
          <text:p text:style-name="P1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ounded Rectangle 16" draw:style-name="gr39" draw:text-style-name="P21" draw:layer="layout" svg:width="7.238cm" svg:height="11.429cm" svg:x="16.993cm" svg:y="3.86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7" draw:style-name="gr1" draw:text-style-name="P2" draw:layer="layout" svg:width="7.238cm" svg:height="1.396cm" svg:x="16.993cm" svg:y="3.86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0" draw:text-style-name="P4" draw:layer="layout" svg:width="7.238cm" svg:height="0.882cm" svg:x="16.993cm" svg:y="4.155cm">
          <text:p text:style-name="P1"><text:span text:style-name="T28">Phas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1" draw:text-style-name="P4" draw:layer="layout" svg:width="6.628cm" svg:height="1.096cm" svg:x="17.297cm" svg:y="5.512cm">
          <text:p text:style-name="P1"><text:span text:style-name="T29">P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5" draw:text-style-name="P18" draw:layer="layout" svg:width="6.476cm" svg:height="2.617cm" svg:x="17.374cm" svg:y="7.366cm">
          <text:p><text:span text:style-name="T30">AI generates fix.</text:span></text:p>
          <text:p><text:span text:style-name="T30">Same exact payload</text:span></text:p>
          <text:p><text:span text:style-name="T30">fires again —</text:span></text:p>
          <text:p text:style-name="P1"><text:span text:style-name="T30">must FAI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1" draw:style-name="gr1" draw:text-style-name="P2" draw:layer="layout" svg:width="0.405cm" svg:height="1.269cm" svg:x="24.308cm" svg:y="8.687cm">
          <text:p text:style-name="P1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ounded Rectangle 22" draw:style-name="gr42" draw:text-style-name="P22" draw:layer="layout" svg:width="7.238cm" svg:height="11.429cm" svg:x="24.79cm" svg:y="3.86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3" draw:style-name="gr1" draw:text-style-name="P2" draw:layer="layout" svg:width="7.238cm" svg:height="1.396cm" svg:x="24.79cm" svg:y="3.86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3" draw:text-style-name="P4" draw:layer="layout" svg:width="7.238cm" svg:height="0.882cm" svg:x="24.79cm" svg:y="4.155cm">
          <text:p text:style-name="P1"><text:span text:style-name="T28">Phase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4" draw:text-style-name="P4" draw:layer="layout" svg:width="6.628cm" svg:height="1.096cm" svg:x="25.095cm" svg:y="5.512cm">
          <text:p text:style-name="P1"><text:span text:style-name="T29">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5" draw:text-style-name="P18" draw:layer="layout" svg:width="6.476cm" svg:height="2.617cm" svg:x="25.171cm" svg:y="7.366cm">
          <text:p><text:span text:style-name="T30">vuln_proof + fix_diff</text:span></text:p>
          <text:p><text:span text:style-name="T30">+ fix_proof signed as</text:span></text:p>
          <text:p><text:span text:style-name="T30">one ECDSA-P256</text:span></text:p>
          <text:p text:style-name="P1"><text:span text:style-name="T30">+ Dilithium3 bund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5" draw:text-style-name="P6" draw:layer="layout" svg:width="30.987cm" svg:height="0.799cm" svg:x="1.397cm" svg:y="15.621cm">
          <text:p text:style-name="P5"><text:span text:style-name="T31">No static analysis — a real Docker container boots, a real attack runs, and the cage is proven to hol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6" draw:text-style-name="P4" draw:layer="layout" svg:width="29.717cm" svg:height="3.043cm" svg:x="2.032cm" svg:y="7.112cm">
          <text:p text:style-name="P1"><text:span text:style-name="T32">Live Demo</text:span></text:p>
          <text:p text:style-name="P1"><text:span text:style-name="T33">Real repo · real finding · real exploit · signed rece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ank">
        <draw:custom-shape draw:name="TextBox 1" draw:style-name="gr47" draw:text-style-name="P6" draw:layer="layout" svg:width="30.733cm" svg:height="1.518cm" svg:x="1.524cm" svg:y="1.067cm">
          <text:p text:style-name="P5"><text:span text:style-name="T14">Run Detail — payments-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8" draw:text-style-name="P6" draw:layer="layout" svg:width="30.479cm" svg:height="0.841cm" svg:x="1.575cm" svg:y="3.404cm">
          <text:p text:style-name="P5"><text:span text:style-name="T15">64 findings · 13 HIGH · 4 Confirmed Tier — SQL injection, eval, hardcoded secr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18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39972646A3A24F91.png" xlink:type="simple" xlink:show="embed" xlink:actuate="onLoad" draw:mime-type="image/png">
            <text:p/>
          </draw:image>
          <svg:desc>run-detail.png</svg:desc>
        </draw:frame>
        <draw:custom-shape draw:name="TextBox 6" draw:style-name="gr49" draw:text-style-name="P6" draw:layer="layout" svg:width="30.733cm" svg:height="0.756cm" svg:x="1.524cm" svg:y="17.653cm">
          <text:p text:style-name="P5"><text:span text:style-name="T26">Each finding: canonical rule ID, severity, confidence score, taint-confirmed flag. Tabs: compliance mapping, attestation, PR risk sc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ank">
        <draw:custom-shape draw:name="TextBox 1" draw:style-name="gr50" draw:text-style-name="P6" draw:layer="layout" svg:width="30.733cm" svg:height="1.518cm" svg:x="1.524cm" svg:y="1.067cm">
          <text:p text:style-name="P5"><text:span text:style-name="T14">OWASP Top 10 — Compliance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1" draw:text-style-name="P6" draw:layer="layout" svg:width="30.479cm" svg:height="0.841cm" svg:x="1.575cm" svg:y="3.404cm">
          <text:p text:style-name="P5"><text:span text:style-name="T15">A03 Injection: 8 findings · A02 Crypto: 3 · 9/10 categories cov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18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9B13F9416310CB96.png" xlink:type="simple" xlink:show="embed" xlink:actuate="onLoad" draw:mime-type="image/png">
            <text:p/>
          </draw:image>
          <svg:desc>compliance.png</svg:desc>
        </draw:frame>
        <draw:custom-shape draw:name="TextBox 6" draw:style-name="gr52" draw:text-style-name="P6" draw:layer="layout" svg:width="30.733cm" svg:height="0.756cm" svg:x="1.524cm" svg:y="17.653cm">
          <text:p text:style-name="P5"><text:span text:style-name="T26">Score calculated from passed categories. On numpy, pandas, pydantic, requests — 0 HIGH findings reported (0.0% false-positive rate on clean, mature cod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ank">
        <draw:custom-shape draw:name="TextBox 1" draw:style-name="gr53" draw:text-style-name="P6" draw:layer="layout" svg:width="30.733cm" svg:height="1.518cm" svg:x="1.524cm" svg:y="1.067cm">
          <text:p text:style-name="P5"><text:span text:style-name="T14">Cryptographic Attestation — Signature Ver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4" draw:text-style-name="P6" draw:layer="layout" svg:width="30.479cm" svg:height="0.841cm" svg:x="1.575cm" svg:y="3.404cm">
          <text:p text:style-name="P5"><text:span text:style-name="T15">ECDSA-P256 primary · Dilithium3 post-quantum · public key embedded in bu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18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696B7B98C1B217B9.png" xlink:type="simple" xlink:show="embed" xlink:actuate="onLoad" draw:mime-type="image/png">
            <text:p/>
          </draw:image>
          <svg:desc>attestation.png</svg:desc>
        </draw:frame>
        <draw:custom-shape draw:name="TextBox 6" draw:style-name="gr55" draw:text-style-name="P6" draw:layer="layout" svg:width="30.733cm" svg:height="1.263cm" svg:x="1.524cm" svg:y="17.653cm">
          <text:p text:style-name="P5"><text:span text:style-name="T26">Tamper-evident: alter any finding and verification fails instantly. Verify in one command: python scripts/verify_attestation.py &lt;bundle.json&gt;. EU CRA Sept 2026 requires this class of provena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">
        <draw:custom-shape draw:name="TextBox 1" draw:style-name="gr56" draw:text-style-name="P6" draw:layer="layout" svg:width="30.733cm" svg:height="1.518cm" svg:x="1.524cm" svg:y="1.067cm">
          <text:p text:style-name="P5"><text:span text:style-name="T14">Competitive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7" draw:text-style-name="P6" draw:layer="layout" svg:width="30.479cm" svg:height="0.841cm" svg:x="1.575cm" svg:y="3.404cm">
          <text:p text:style-name="P5"><text:span text:style-name="T15">The one quadrant the market leaves open: open-source, first-party, in-CI, attested, at $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0.479cm" svg:height="10.158cm" svg:x="1.778cm" svg:y="5.08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5"><text:span text:style-name="T34">Capability</text:span></text:p>
              </table:table-cell>
              <table:table-cell>
                <text:p text:style-name="P1"><text:span text:style-name="T34">Snyk</text:span></text:p>
              </table:table-cell>
              <table:table-cell>
                <text:p text:style-name="P1"><text:span text:style-name="T34">Semgrep</text:span></text:p>
              </table:table-cell>
              <table:table-cell>
                <text:p text:style-name="P1"><text:span text:style-name="T34">GHAS</text:span></text:p>
              </table:table-cell>
              <table:table-cell>
                <text:p text:style-name="P1"><text:span text:style-name="T35">ACR-QA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7">Exploit verification (Docker)</text:span></text:p>
              </table:table-cell>
              <table:table-cell>
                <text:p text:style-name="P1"><text:span text:style-name="T36">✗</text:span></text:p>
              </table:table-cell>
              <table:table-cell>
                <text:p text:style-name="P1"><text:span text:style-name="T36">✗</text:span></text:p>
              </table:table-cell>
              <table:table-cell>
                <text:p text:style-name="P1"><text:span text:style-name="T36">✗</text:span></text:p>
              </table:table-cell>
              <table:table-cell table:style-name="ce3">
                <text:p text:style-name="P1"><text:span text:style-name="T37">✓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7">Re-exploit to verify the fix</text:span></text:p>
              </table:table-cell>
              <table:table-cell>
                <text:p text:style-name="P1"><text:span text:style-name="T36">✗</text:span></text:p>
              </table:table-cell>
              <table:table-cell>
                <text:p text:style-name="P1"><text:span text:style-name="T36">✗</text:span></text:p>
              </table:table-cell>
              <table:table-cell>
                <text:p text:style-name="P1"><text:span text:style-name="T36">✗</text:span></text:p>
              </table:table-cell>
              <table:table-cell table:style-name="ce3">
                <text:p text:style-name="P1"><text:span text:style-name="T37">✓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7">Cryptographic attestation</text:span></text:p>
              </table:table-cell>
              <table:table-cell>
                <text:p text:style-name="P1"><text:span text:style-name="T36">✗</text:span></text:p>
              </table:table-cell>
              <table:table-cell>
                <text:p text:style-name="P1"><text:span text:style-name="T36">✗</text:span></text:p>
              </table:table-cell>
              <table:table-cell>
                <text:p text:style-name="P1"><text:span text:style-name="T36">✗</text:span></text:p>
              </table:table-cell>
              <table:table-cell table:style-name="ce3">
                <text:p text:style-name="P1"><text:span text:style-name="T37">✓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7">Confirmed Tier (auto-block)</text:span></text:p>
              </table:table-cell>
              <table:table-cell>
                <text:p text:style-name="P1"><text:span text:style-name="T36">✗</text:span></text:p>
              </table:table-cell>
              <table:table-cell>
                <text:p text:style-name="P1"><text:span text:style-name="T36">✗</text:span></text:p>
              </table:table-cell>
              <table:table-cell>
                <text:p text:style-name="P1"><text:span text:style-name="T36">✗</text:span></text:p>
              </table:table-cell>
              <table:table-cell table:style-name="ce3">
                <text:p text:style-name="P1"><text:span text:style-name="T37">✓ </text:span><text:span text:style-name="T37">96.4%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7">Self-hosted / $0 recurring</text:span></text:p>
              </table:table-cell>
              <table:table-cell>
                <text:p text:style-name="P1"><text:span text:style-name="T36">✗</text:span></text:p>
              </table:table-cell>
              <table:table-cell>
                <text:p text:style-name="P1"><text:span text:style-name="T36">✗</text:span></text:p>
              </table:table-cell>
              <table:table-cell>
                <text:p text:style-name="P1"><text:span text:style-name="T36">✗</text:span></text:p>
              </table:table-cell>
              <table:table-cell table:style-name="ce3">
                <text:p text:style-name="P1"><text:span text:style-name="T37">✓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TextBox 1" draw:style-name="gr58" draw:text-style-name="P6" draw:layer="layout" svg:width="29.209cm" svg:height="1.603cm" svg:x="2.286cm" svg:y="2.54cm">
          <text:p text:style-name="P5"><text:span text:style-name="T38">What ACR-QA Del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2.337cm" svg:y="4.69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1" draw:text-style-name="P2" draw:layer="layout" svg:width="4.317cm" svg:height="1.777cm" svg:x="2.413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" draw:style-name="gr59" draw:text-style-name="P4" draw:layer="layout" svg:width="4.317cm" svg:height="0.968cm" svg:x="2.413cm" svg:y="6.271cm">
          <text:p text:style-name="P1"><text:span text:style-name="T39">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0" draw:text-style-name="P6" draw:layer="layout" svg:width="24.383cm" svg:height="0.968cm" svg:x="7.366cm" svg:y="6.348cm">
          <text:p text:style-name="P5"><text:span text:style-name="T40">96.4% Confirmed-Tier precision — high enough to auto-block a 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" draw:text-style-name="P2" draw:layer="layout" svg:width="4.317cm" svg:height="1.777cm" svg:x="2.413cm" svg:y="8.17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7" draw:style-name="gr61" draw:text-style-name="P4" draw:layer="layout" svg:width="4.317cm" svg:height="0.968cm" svg:x="2.413cm" svg:y="8.608cm">
          <text:p text:style-name="P1"><text:span text:style-name="T39">Pro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2" draw:text-style-name="P6" draw:layer="layout" svg:width="24.383cm" svg:height="0.968cm" svg:x="7.366cm" svg:y="8.684cm">
          <text:p text:style-name="P5"><text:span text:style-name="T40">Exploit-verified in a sandbox + cryptographically signed — not gu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" draw:text-style-name="P2" draw:layer="layout" svg:width="4.317cm" svg:height="1.777cm" svg:x="2.413cm" svg:y="10.51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" draw:style-name="gr63" draw:text-style-name="P4" draw:layer="layout" svg:width="4.317cm" svg:height="0.968cm" svg:x="2.413cm" svg:y="10.945cm">
          <text:p text:style-name="P1"><text:span text:style-name="T39">Re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4" draw:text-style-name="P6" draw:layer="layout" svg:width="24.383cm" svg:height="0.968cm" svg:x="7.366cm" svg:y="11.021cm">
          <text:p text:style-name="P5"><text:span text:style-name="T40">19 engines · Python / JS / Go · 9/10 OWASP · 100% CVE re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" draw:text-style-name="P2" draw:layer="layout" svg:width="4.317cm" svg:height="1.777cm" svg:x="2.413cm" svg:y="12.85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3" draw:style-name="gr65" draw:text-style-name="P4" draw:layer="layout" svg:width="4.317cm" svg:height="0.968cm" svg:x="2.413cm" svg:y="13.282cm">
          <text:p text:style-name="P1"><text:span text:style-name="T39">P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6" draw:text-style-name="P6" draw:layer="layout" svg:width="24.383cm" svg:height="0.968cm" svg:x="7.366cm" svg:y="13.358cm">
          <text:p text:style-name="P5"><text:span text:style-name="T40">Self-hosted, your data never leaves, $0 recurring — vs $10–50k/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7" draw:text-style-name="P6" draw:layer="layout" svg:width="29.209cm" svg:height="0.925cm" svg:x="2.413cm" svg:y="16.002cm">
          <text:p text:style-name="P5"><text:span text:style-name="T41">Detection you can trust, exploit-proof you can verify, a signed record of all of it — on any machine, at zero co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7.3.7.2$Linux_X86_64 LibreOffice_project/30$Build-2</meta:generator>
    <meta:document-statistic meta:object-count="158"/>
    <meta:user-defined meta:name="AppVersion">14.0000</meta:user-defined>
    <meta:user-defined meta:name="PresentationFormat">On-screen Show (4:3)</meta:user-defined>
  </office:meta>
</office:document-meta>
</file>