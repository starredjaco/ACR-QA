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4000000708696B7B98C1B217B9.png" manifest:media-type="image/png"/>
  <manifest:file-entry manifest:full-path="Pictures/TablePreview2.svm" manifest:media-type=""/>
  <manifest:file-entry manifest:full-path="Pictures/1000000000000B40000007089B13F9416310CB96.png" manifest:media-type="image/png"/>
  <manifest:file-entry manifest:full-path="Pictures/TablePreview1.svm" manifest:media-type=""/>
  <manifest:file-entry manifest:full-path="Pictures/1000000000000B400000070839972646A3A24F91.png" manifest:media-type="image/png"/>
  <manifest:file-entry manifest:full-path="Pictures/1000000000000B4000000708C4F51405ED82B8E6.png" manifest:media-type="image/png"/>
  <manifest:file-entry manifest:full-path="Pictures/10000000000000E1000000E0AFCD633B861B4D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265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1a3d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c9a84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.026cm" svg:stroke-linecap="butt" draw:fill="solid" draw:fill-color="#f4f6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2" style:family="graphic" style:parent-style-name="standard">
      <style:graphic-properties draw:stroke="none" svg:stroke-width="0.026cm" svg:stroke-linecap="butt" draw:fill="solid" draw:fill-color="#0026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.026cm" svg:stroke-linecap="butt" draw:fill="solid" draw:fill-color="#dc363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width="0.026cm" svg:stroke-linecap="butt" draw:fill="solid" draw:fill-color="#001a3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20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53cm" svg:stroke-color="#002654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29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.026cm" svg:stroke-linecap="butt" draw:fill="solid" draw:fill-color="#27334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36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svg:stroke-width="0.026cm" svg:stroke-linecap="butt" draw:fill="solid" draw:fill-color="#1b4d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41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none" svg:stroke-width="0.026cm" svg:stroke-linecap="butt" draw:fill="solid" draw:fill-color="#189e5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44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7.272cm" style:use-optimal-column-width="false"/>
    </style:style>
    <style:style style:name="co2" style:family="table-column">
      <style:table-column-properties style:column-width="13.208cm" style:use-optimal-column-width="false"/>
    </style:style>
    <style:style style:name="co3" style:family="table-column">
      <style:table-column-properties style:column-width="12.7cm" style:use-optimal-column-width="false"/>
    </style:style>
    <style:style style:name="co4" style:family="table-column">
      <style:table-column-properties style:column-width="4.445cm" style:use-optimal-column-width="false"/>
    </style:style>
    <style:style style:name="ro1" style:family="table-row">
      <style:table-row-properties style:row-height="1.669cm" style:use-optimal-row-height="false"/>
    </style:style>
    <style:style style:name="ro2" style:family="table-row">
      <style:table-row-properties style:row-height="1.693cm" style:use-optimal-row-height="false"/>
    </style:style>
    <style:style style:name="ro3" style:family="table-row">
      <style:table-row-properties style:row-height="1.694cm" style:use-optimal-row-height="false"/>
    </style:style>
    <style:style style:name="ce1" style:family="table-cell">
      <loext:graphic-properties draw:fill="solid" draw:fill-color="#002654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9f7ef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c9a84c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98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.247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.247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4f6f9"/>
      <style:paragraph-properties fo:text-align="center" style:font-independent-line-spacing="true"/>
      <style:text-properties fo:font-size="18pt"/>
    </style:style>
    <style:style style:name="P14" style:family="paragraph">
      <loext:graphic-properties draw:fill="solid" draw:fill-color="#002654"/>
      <style:paragraph-properties fo:text-align="center" style:font-independent-line-spacing="true"/>
      <style:text-properties fo:font-size="18pt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dc3636"/>
      <style:paragraph-properties fo:text-align="center" style:font-independent-line-spacing="true"/>
      <style:text-properties fo:font-size="18pt"/>
    </style:style>
    <style:style style:name="P17" style:family="paragraph">
      <loext:graphic-properties draw:fill="solid" draw:fill-color="#001a3d"/>
      <style:paragraph-properties fo:text-align="center" style:font-independent-line-spacing="true"/>
      <style:text-properties fo:font-size="18pt"/>
    </style:style>
    <style:style style:name="P18" style:family="paragraph">
      <style:paragraph-properties fo:margin-left="1.27cm" fo:margin-right="0cm" fo:margin-top="0cm" fo:margin-bottom="0.247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0" style:family="paragraph">
      <loext:graphic-properties draw:fill="solid" draw:fill-color="#273342"/>
      <style:paragraph-properties fo:text-align="center" style:font-independent-line-spacing="true"/>
      <style:text-properties fo:font-size="18pt"/>
    </style:style>
    <style:style style:name="P21" style:family="paragraph">
      <loext:graphic-properties draw:fill="solid" draw:fill-color="#1b4d89"/>
      <style:paragraph-properties fo:text-align="center" style:font-independent-line-spacing="true"/>
      <style:text-properties fo:font-size="18pt"/>
    </style:style>
    <style:style style:name="P22" style:family="paragraph">
      <loext:graphic-properties draw:fill="solid" draw:fill-color="#189e53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62pt" fo:letter-spacing="normal" fo:language="en" fo:country="US" fo:font-style="normal" style:text-underline-style="none" fo:font-weight="bold" fo:background-color="transparent" style:font-size-asian="62pt" style:font-style-asian="normal" style:font-weight-asian="bold" style:font-size-complex="62pt" style:font-style-complex="normal" style:font-weight-complex="bold"/>
    </style:style>
    <style:style style:name="T3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font-variant="normal" fo:text-transform="none" fo:color="#c8d2e0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3" style:family="text">
      <style:text-properties fo:font-variant="normal" fo:text-transform="none" fo:color="#9fb0c4" loext:opacity="100%" style:text-line-through-style="none" style:text-line-through-type="none" style:text-position="0% 100%" style:font-name="Calibri" fo:font-size="17pt" fo:letter-spacing="normal" fo:language="en" fo:country="US" fo:font-style="italic" style:text-underline-style="none" fo:font-weight="normal" fo:background-color="transparent" style:font-size-asian="17pt" style:font-style-asian="italic" style:font-weight-asian="normal" style:font-size-complex="17pt" style:font-style-complex="italic" style:font-weight-complex="normal"/>
    </style:style>
    <style:style style:name="T14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5" style:family="text">
      <style:text-properties fo:font-variant="normal" fo:text-transform="none" fo:color="#141a22" loext:opacity="100%" style:text-line-through-style="none" style:text-line-through-type="none" style:text-position="0% 100%" style:font-name="Calibri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16" style:family="text">
      <style:text-properties fo:font-variant="normal" fo:text-transform="none" fo:color="#189e53" loext:opacity="100%" style:text-line-through-style="none" style:text-line-through-type="none" style:text-position="0% 100%" style:font-name="Calibri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17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141a22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dc3636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46pt" fo:letter-spacing="normal" fo:language="en" fo:country="US" fo:font-style="normal" style:text-underline-style="none" fo:font-weight="bold" fo:background-color="transparent" style:font-size-asian="46pt" style:font-style-asian="normal" style:font-weight-asian="bold" style:font-size-complex="46pt" style:font-style-complex="normal" style:font-weight-complex="bold"/>
    </style:style>
    <style:style style:name="T23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24" style:family="text">
      <style:text-properties fo:font-variant="normal" fo:text-transform="none" fo:color="#189e53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5b6672" loext:opacity="100%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28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font-variant="normal" fo:text-transform="none" fo:color="#189e53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32" style:family="text">
      <style:text-properties fo:font-variant="normal" fo:text-transform="none" fo:color="#141a22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33" style:family="text">
      <style:text-properties fo:font-variant="normal" fo:text-transform="none" fo:color="#189e53" loext:opacity="100%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34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3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6pt" fo:letter-spacing="normal" fo:language="en" fo:country="US" fo:font-style="normal" style:text-underline-style="none" fo:font-weight="bold" fo:background-color="transparent" style:font-size-asian="46pt" style:font-style-asian="normal" style:font-weight-asian="bold" style:font-size-complex="46pt" style:font-style-complex="normal" style:font-weight-complex="bold"/>
    </style:style>
    <style:style style:name="T36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c2c8c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font-variant="normal" fo:text-transform="none" fo:color="#002654" loext:opacity="100%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bold" fo:background-color="transparent" style:font-size-asian="17pt" style:font-style-asian="normal" style:font-weight-asian="bold" style:font-size-complex="17pt" style:font-style-complex="normal" style:font-weight-complex="bold"/>
    </style:style>
    <style:style style:name="T4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43" style:family="text">
      <style:text-properties fo:font-variant="normal" fo:text-transform="none" fo:color="#c9a84c" loext:opacity="100%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9a8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c8d2e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9fb0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26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141a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189e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dc363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26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89e5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141a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89e5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5b6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c2c8c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Rectangle 1" draw:style-name="gr1" draw:text-style-name="P2" draw:layer="layout" svg:width="33.865cm" svg:height="1.015cm" svg:x="0cm" svg:y="18.03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571cm" svg:height="3.555cm" svg:x="15.418cm" svg:y="1.778cm">
          <draw:image xlink:href="Pictures/10000000000000E1000000E0AFCD633B861B4D86.png" xlink:type="simple" xlink:show="embed" xlink:actuate="onLoad" draw:mime-type="image/png">
            <text:p/>
          </draw:image>
          <svg:desc>ksiu-logo.png</svg:desc>
        </draw:frame>
        <draw:custom-shape draw:name="TextBox 3" draw:style-name="gr3" draw:text-style-name="P4" draw:layer="layout" svg:width="29.717cm" svg:height="4.481cm" svg:x="2.032cm" svg:y="6.35cm">
          <text:p text:style-name="P1"><text:span text:style-name="T2">ACR-QA</text:span></text:p>
          <text:p text:style-name="P1"><text:span text:style-name="T3">Automated Code Review &amp; Quality Assurance</text:span></text:p>
          <text:p text:style-name="P1"><text:span text:style-name="T4">The trust layer for AI-written code — exploit-verified, cryptographically attes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6" draw:layer="layout" svg:width="29.717cm" svg:height="2.788cm" svg:x="2.032cm" svg:y="13.97cm">
          <text:p text:style-name="P5"><text:span text:style-name="T5"/></text:p>
          <text:p text:style-name="P1"><text:span text:style-name="T6">Ahmed Mahmoud Abbas</text:span></text:p>
          <text:p text:style-name="P1"><text:span text:style-name="T7">Supervisor: Dr. Samy AbdelNabi</text:span></text:p>
          <text:p text:style-name="P1"><text:span text:style-name="T8">Faculty of Computer Science &amp; Engineering · CSE494 Graduation Project 2 ·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TextBox 1" draw:style-name="gr6" draw:text-style-name="P6" draw:layer="layout" svg:width="28.701cm" svg:height="8.318cm" svg:x="2.54cm" svg:y="3.81cm">
          <text:p text:style-name="P5"><text:span text:style-name="T9">AI now writes a third of new code.</text:span></text:p>
          <text:p text:style-name="P8"><text:span text:style-name="T10">It also writes </text:span><text:span text:style-name="T11">1.88× more vulnerabilities</text:span><text:span text:style-name="T10"> than humans —</text:span></text:p>
          <text:p text:style-name="P5"><text:span text:style-name="T10">and vulnerabilities per codebase jumped </text:span><text:span text:style-name="T11">+107% in a year.</text:span></text:p>
          <text:p text:style-name="P9"><text:span text:style-name="T12">Your scanner flags 1,900 issues. Which one breaches you?</text:span></text:p>
          <text:p text:style-name="P10"><text:span text:style-name="T13">Nobody can review that. So teams ship blind — or pay $50k/year and still don't trust the outpu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draw:custom-shape draw:name="TextBox 1" draw:style-name="gr7" draw:text-style-name="P6" draw:layer="layout" svg:width="30.733cm" svg:height="1.518cm" svg:x="1.524cm" svg:y="1.067cm">
          <text:p text:style-name="P5"><text:span text:style-name="T14">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" draw:text-style-name="P12" draw:layer="layout" svg:width="30.479cm" svg:height="7.359cm" svg:x="1.778cm" svg:y="4.699cm">
          <text:p text:style-name="P11"><text:span text:style-name="T15">● <text:s/></text:span><text:span text:style-name="T15">The problem &amp; the market</text:span></text:p>
          <text:p text:style-name="P11"><text:span text:style-name="T15">● <text:s/></text:span><text:span text:style-name="T15">Solution &amp; core innovations</text:span></text:p>
          <text:p text:style-name="P11"><text:span text:style-name="T15">● <text:s/></text:span><text:span text:style-name="T15">Architecture · RAG engine · data model</text:span></text:p>
          <text:p text:style-name="P11"><text:span text:style-name="T15">● <text:s/></text:span><text:span text:style-name="T15">From noise to trust — the Confirmed Tier</text:span></text:p>
          <text:p text:style-name="P11"><text:span text:style-name="T16">● <text:s/></text:span><text:span text:style-name="T16">Evaluation &amp; results</text:span></text:p>
          <text:p text:style-name="P11"><text:span text:style-name="T16">● <text:s/></text:span><text:span text:style-name="T16">Live demo</text:span></text:p>
          <text:p text:style-name="P11"><text:span text:style-name="T15">● <text:s/></text:span><text:span text:style-name="T15">Competitive position · the 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Blank">
        <draw:custom-shape draw:name="TextBox 1" draw:style-name="gr9" draw:text-style-name="P6" draw:layer="layout" svg:width="30.733cm" svg:height="1.518cm" svg:x="1.524cm" svg:y="1.067cm">
          <text:p text:style-name="P5"><text:span text:style-name="T14">The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0" draw:text-style-name="P6" draw:layer="layout" svg:width="30.479cm" svg:height="0.841cm" svg:x="1.575cm" svg:y="3.404cm">
          <text:p text:style-name="P5"><text:span text:style-name="T17">Three reasons teams can't trust automated code review 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1" draw:text-style-name="P13" draw:layer="layout" svg:width="10.032cm" svg:height="10.667cm" svg:x="1.524cm" svg:y="5.0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" draw:style-name="gr12" draw:text-style-name="P14" draw:layer="layout" svg:width="10.032cm" svg:height="0.405cm" svg:x="1.524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" draw:text-style-name="P6" draw:layer="layout" svg:width="8.762cm" svg:height="3.817cm" svg:x="2.159cm" svg:y="5.969cm">
          <text:p text:style-name="P5"><text:span text:style-name="T18">Quality variance</text:span></text:p>
          <text:p text:style-name="P15"><text:span text:style-name="T19">Manual review is inconsistent — expertise and attention vary. The SQL injection on line 47 slips through on the 50th PR of the da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11" draw:text-style-name="P13" draw:layer="layout" svg:width="10.032cm" svg:height="10.667cm" svg:x="12.065cm" svg:y="5.0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8" draw:style-name="gr1" draw:text-style-name="P2" draw:layer="layout" svg:width="10.032cm" svg:height="0.405cm" svg:x="12.065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" draw:text-style-name="P6" draw:layer="layout" svg:width="8.762cm" svg:height="3.817cm" svg:x="12.7cm" svg:y="5.969cm">
          <text:p text:style-name="P5"><text:span text:style-name="T20">Cost barrier</text:span></text:p>
          <text:p text:style-name="P15"><text:span text:style-name="T19">Enterprise tools cost $10k–50k/year. Unaffordable for universities and startups — so they run a basic linter, or noth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11" draw:text-style-name="P13" draw:layer="layout" svg:width="10.032cm" svg:height="10.667cm" svg:x="22.606cm" svg:y="5.0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1" draw:style-name="gr15" draw:text-style-name="P16" draw:layer="layout" svg:width="10.032cm" svg:height="0.405cm" svg:x="22.606cm" svg:y="5.0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6" draw:text-style-name="P6" draw:layer="layout" svg:width="8.762cm" svg:height="3.225cm" svg:x="23.241cm" svg:y="5.969cm">
          <text:p text:style-name="P5"><text:span text:style-name="T21">Hallucination</text:span></text:p>
          <text:p text:style-name="P15"><text:span text:style-name="T19">AI explainers invent plausible-but-wrong guidance. A developer gets burned once and never trusts the tool agai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TextBox 1" draw:style-name="gr17" draw:text-style-name="P6" draw:layer="layout" svg:width="30.733cm" svg:height="1.518cm" svg:x="1.524cm" svg:y="1.27cm">
          <text:p text:style-name="P5"><text:span text:style-name="T12">The Market Re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40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8" draw:text-style-name="P6" draw:layer="layout" svg:width="30.479cm" svg:height="0.841cm" svg:x="1.575cm" svg:y="3.556cm">
          <text:p text:style-name="P5"><text:span text:style-name="T17">Why this is worth solving n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9" draw:text-style-name="P17" draw:layer="layout" svg:width="7.111cm" svg:height="7.619cm" svg:x="1.524cm" svg:y="6.09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5" draw:style-name="gr20" draw:text-style-name="P4" draw:layer="layout" svg:width="7.111cm" svg:height="2.745cm" svg:x="1.524cm" svg:y="8.66cm">
          <text:p text:style-name="P1"><text:span text:style-name="T22">$10–50k</text:span></text:p>
          <text:p text:style-name="P1"><text:span text:style-name="T7">per year for enterprise S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19" draw:text-style-name="P17" draw:layer="layout" svg:width="7.111cm" svg:height="7.619cm" svg:x="9.398cm" svg:y="6.09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7" draw:style-name="gr21" draw:text-style-name="P4" draw:layer="layout" svg:width="7.111cm" svg:height="2.745cm" svg:x="9.398cm" svg:y="8.66cm">
          <text:p text:style-name="P1"><text:span text:style-name="T22">+107%</text:span></text:p>
          <text:p text:style-name="P1"><text:span text:style-name="T7">vulns per codebase, Yo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19" draw:text-style-name="P17" draw:layer="layout" svg:width="7.111cm" svg:height="7.619cm" svg:x="17.272cm" svg:y="6.09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9" draw:style-name="gr22" draw:text-style-name="P4" draw:layer="layout" svg:width="7.111cm" svg:height="2.745cm" svg:x="17.272cm" svg:y="8.66cm">
          <text:p text:style-name="P1"><text:span text:style-name="T22">1.88×</text:span></text:p>
          <text:p text:style-name="P1"><text:span text:style-name="T7">more flaws in AI-written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19" draw:text-style-name="P17" draw:layer="layout" svg:width="7.111cm" svg:height="7.619cm" svg:x="25.146cm" svg:y="6.09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1" draw:style-name="gr23" draw:text-style-name="P4" draw:layer="layout" svg:width="7.111cm" svg:height="2.745cm" svg:x="25.146cm" svg:y="8.66cm">
          <text:p text:style-name="P1"><text:span text:style-name="T22">$0</text:span></text:p>
          <text:p text:style-name="P1"><text:span text:style-name="T7">ACR-QA, self-hos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Blank">
        <draw:custom-shape draw:name="TextBox 1" draw:style-name="gr24" draw:text-style-name="P6" draw:layer="layout" svg:width="30.733cm" svg:height="1.518cm" svg:x="1.524cm" svg:y="1.067cm">
          <text:p text:style-name="P5"><text:span text:style-name="T14">The Solution: ACR-Q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5" draw:text-style-name="P12" draw:layer="layout" svg:width="30.479cm" svg:height="8.035cm" svg:x="1.778cm" svg:y="4.699cm">
          <text:p text:style-name="P11"><text:span text:style-name="T23">● <text:s/></text:span><text:span text:style-name="T23">A self-hosted trust layer on top of your scanners — answers one question at merge time:</text:span></text:p>
          <text:p text:style-name="P18"><text:span text:style-name="T24">– <text:s/></text:span><text:span text:style-name="T24">"Is this finding real enough to block automatically?"</text:span></text:p>
          <text:p text:style-name="P11"><text:span text:style-name="T15">● <text:s/></text:span><text:span text:style-name="T15">RAG-grounded AI explanations — cites the rule, doesn't guess (entropy filter rejects 96% of hallucinated runs)</text:span></text:p>
          <text:p text:style-name="P11"><text:span text:style-name="T15">● <text:s/></text:span><text:span text:style-name="T15">Confirmed Tier — a 4-gate stratum at 96.4% precision, safe to auto-block</text:span></text:p>
          <text:p text:style-name="P11"><text:span text:style-name="T15">● <text:s/></text:span><text:span text:style-name="T15">Exploit verification — detonates a real payload in a Docker sandbox; proven, not claimed</text:span></text:p>
          <text:p text:style-name="P11"><text:span text:style-name="T15">● <text:s/></text:span><text:span text:style-name="T15">ECDSA + post-quantum attestation — every scan is signed and auditable</text:span></text:p>
          <text:p text:style-name="P11"><text:span text:style-name="T23">● <text:s/></text:span><text:span text:style-name="T23">On-premises, zero cloud, zero recurring cost — full data priv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Blank">
        <draw:custom-shape draw:name="TextBox 1" draw:style-name="gr26" draw:text-style-name="P6" draw:layer="layout" svg:width="30.733cm" svg:height="1.518cm" svg:x="1.524cm" svg:y="1.067cm">
          <text:p text:style-name="P5"><text:span text:style-name="T14">Live Dashboard —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7" draw:text-style-name="P6" draw:layer="layout" svg:width="30.479cm" svg:height="0.841cm" svg:x="1.575cm" svg:y="3.404cm">
          <text:p text:style-name="P5"><text:span text:style-name="T17">Real scans · the green Trust Layer banner shows live KP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8" draw:text-style-name="P19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C4F51405ED82B8E6.png" xlink:type="simple" xlink:show="embed" xlink:actuate="onLoad" draw:mime-type="image/png">
            <text:p/>
          </draw:image>
          <svg:desc>overview.png</svg:desc>
        </draw:frame>
        <draw:custom-shape draw:name="TextBox 6" draw:style-name="gr29" draw:text-style-name="P6" draw:layer="layout" svg:width="30.733cm" svg:height="0.756cm" svg:x="1.524cm" svg:y="17.653cm">
          <text:p text:style-name="P5"><text:span text:style-name="T25">Confirmed Tier tile shows the real, server-classified count — never an estimate. Top repos include psf/requests, encode/httpx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Blank">
        <draw:custom-shape draw:name="TextBox 1" draw:style-name="gr30" draw:text-style-name="P6" draw:layer="layout" svg:width="30.733cm" svg:height="1.518cm" svg:x="1.524cm" svg:y="1.067cm">
          <text:p text:style-name="P5"><text:span text:style-name="T14">System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1" draw:text-style-name="P6" draw:layer="layout" svg:width="30.479cm" svg:height="0.841cm" svg:x="1.575cm" svg:y="3.404cm">
          <text:p text:style-name="P5"><text:span text:style-name="T17">Python, JavaScript/TypeScript, and Go adapters implemen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2" draw:text-style-name="P12" draw:layer="layout" svg:width="30.479cm" svg:height="7.359cm" svg:x="1.778cm" svg:y="4.699cm">
          <text:p text:style-name="P11"><text:span text:style-name="T15">● <text:s/></text:span><text:span text:style-name="T15">Push → webhook → extract PR diff → enqueue (Redis)</text:span></text:p>
          <text:p text:style-name="P11"><text:span text:style-name="T15">● <text:s/></text:span><text:span text:style-name="T15">Detection: language adapter runs the tool suite in parallel (Ruff, Semgrep, Bandit, Vulture, Radon, jscpd)</text:span></text:p>
          <text:p text:style-name="P11"><text:span text:style-name="T15">● <text:s/></text:span><text:span text:style-name="T15">Normalize: every tool's JSON → one CanonicalFinding schema</text:span></text:p>
          <text:p text:style-name="P11"><text:span text:style-name="T15">● <text:s/></text:span><text:span text:style-name="T15">Trust gates: confidence → reachability + taint → Confirmed Tier → exploit verification</text:span></text:p>
          <text:p text:style-name="P11"><text:span text:style-name="T15">● <text:s/></text:span><text:span text:style-name="T15">RAG: retrieve rule definition → grounded explanation → entropy-validate</text:span></text:p>
          <text:p text:style-name="P11"><text:span text:style-name="T15">● <text:s/></text:span><text:span text:style-name="T15">Persist to PostgreSQL (full audit trail) → ECDSA-sign → post PR comments by severity</text:span></text:p>
          <text:p text:style-name="P11"><text:span text:style-name="T16">● <text:s/></text:span><text:span text:style-name="T16">End to end: 30–90 seconds per P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Blank">
        <draw:custom-shape draw:name="TextBox 1" draw:style-name="gr33" draw:text-style-name="P6" draw:layer="layout" svg:width="30.733cm" svg:height="1.518cm" svg:x="1.524cm" svg:y="1.067cm">
          <text:p text:style-name="P5"><text:span text:style-name="T14">From Noise to T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4" draw:text-style-name="P6" draw:layer="layout" svg:width="30.479cm" svg:height="0.841cm" svg:x="1.575cm" svg:y="3.404cm">
          <text:p text:style-name="P5"><text:span text:style-name="T17">The Confirmed Tier: the few findings precise enough to auto-block a me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35" draw:text-style-name="P20" draw:layer="layout" svg:width="24.383cm" svg:height="2.336cm" svg:x="4.741cm" svg:y="5.207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5" draw:style-name="gr36" draw:text-style-name="P4" draw:layer="layout" svg:width="24.383cm" svg:height="1.348cm" svg:x="4.741cm" svg:y="5.714cm">
          <text:p text:style-name="P1"><text:span text:style-name="T26">1,942 <text:s text:c="2"/></text:span><text:span text:style-name="T27">raw find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7" draw:text-style-name="P6" draw:layer="layout" svg:width="8.127cm" svg:height="0.756cm" svg:x="29.506cm" svg:y="5.715cm">
          <text:p text:style-name="P5"><text:span text:style-name="T25">30–70% are noise (industry baselin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12" draw:text-style-name="P14" draw:layer="layout" svg:width="19.303cm" svg:height="2.336cm" svg:x="7.281cm" svg:y="8.204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8" draw:style-name="gr38" draw:text-style-name="P4" draw:layer="layout" svg:width="19.303cm" svg:height="1.348cm" svg:x="7.281cm" svg:y="8.711cm">
          <text:p text:style-name="P1"><text:span text:style-name="T26">219 <text:s text:c="2"/></text:span><text:span text:style-name="T27">security-t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9" draw:text-style-name="P6" draw:layer="layout" svg:width="8.127cm" svg:height="0.756cm" svg:x="26.966cm" svg:y="8.712cm">
          <text:p text:style-name="P5"><text:span text:style-name="T25">filtered by canonical rule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40" draw:text-style-name="P21" draw:layer="layout" svg:width="14.731cm" svg:height="2.336cm" svg:x="9.567cm" svg:y="11.201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1" draw:style-name="gr41" draw:text-style-name="P4" draw:layer="layout" svg:width="14.731cm" svg:height="1.348cm" svg:x="9.567cm" svg:y="11.708cm">
          <text:p text:style-name="P1"><text:span text:style-name="T26">151 <text:s text:c="2"/></text:span><text:span text:style-name="T27">+ taint g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2" draw:text-style-name="P6" draw:layer="layout" svg:width="8.127cm" svg:height="0.756cm" svg:x="24.68cm" svg:y="11.709cm">
          <text:p text:style-name="P5"><text:span text:style-name="T25">HTTP-source confirm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43" draw:text-style-name="P22" draw:layer="layout" svg:width="10.159cm" svg:height="2.336cm" svg:x="11.853cm" svg:y="14.199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4" draw:style-name="gr44" draw:text-style-name="P4" draw:layer="layout" svg:width="10.159cm" svg:height="1.348cm" svg:x="11.853cm" svg:y="14.705cm">
          <text:p text:style-name="P1"><text:span text:style-name="T26">55 <text:s text:c="2"/></text:span><text:span text:style-name="T27">Confirmed T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5" draw:text-style-name="P6" draw:layer="layout" svg:width="8.127cm" svg:height="0.756cm" svg:x="22.394cm" svg:y="14.707cm">
          <text:p text:style-name="P5"><text:span text:style-name="T25">96.4% precision · exploit-verifi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6" draw:text-style-name="P6" draw:layer="layout" svg:width="30.733cm" svg:height="0.756cm" svg:x="1.524cm" svg:y="17.653cm">
          <text:p text:style-name="P5"><text:span text:style-name="T28">Turn the 55 on as a required status check. The other ~1,887 stay visible and fixable — they just don't block the merg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lank">
        <draw:custom-shape draw:name="TextBox 1" draw:style-name="gr47" draw:text-style-name="P6" draw:layer="layout" svg:width="30.733cm" svg:height="1.518cm" svg:x="1.524cm" svg:y="1.067cm">
          <text:p text:style-name="P5"><text:span text:style-name="T14">Evaluation &amp;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8" draw:text-style-name="P6" draw:layer="layout" svg:width="30.479cm" svg:height="0.841cm" svg:x="1.575cm" svg:y="3.404cm">
          <text:p text:style-name="P5"><text:span text:style-name="T17">Not just built — measured on adversarial corpora, against the standard 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30.479cm" svg:height="11.682cm" svg:x="1.778cm" svg:y="4.95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9">What we measured</text:span></text:p>
              </table:table-cell>
              <table:table-cell>
                <text:p text:style-name="P5"><text:span text:style-name="T29">Result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9">Confirmed-Tier precision (auto-block stratum)</text:span></text:p>
              </table:table-cell>
              <table:table-cell>
                <text:p text:style-name="P5"><text:span text:style-name="T30">96.4% <text:s/>(95% CI 90.9–100%)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9">CVE recall (pre-registered battery)</text:span></text:p>
              </table:table-cell>
              <table:table-cell>
                <text:p text:style-name="P5"><text:span text:style-name="T30">100% — 8 / 8 detectable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9">Head-to-head F1</text:span></text:p>
              </table:table-cell>
              <table:table-cell>
                <text:p text:style-name="P5"><text:span text:style-name="T30">98.2% <text:s/>vs Semgrep 45.7% / Bandit 21.8%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9">OWASP Top 10 coverage</text:span></text:p>
              </table:table-cell>
              <table:table-cell>
                <text:p text:style-name="P5"><text:span text:style-name="T30">9 / 10 categories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9">RealVuln 2026 leaderboard</text:span></text:p>
              </table:table-cell>
              <table:table-cell>
                <text:p text:style-name="P5"><text:span text:style-name="T30">25.1% — beats Semgrep, Snyk, SonarQube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9">Test suite / CORE coverage</text:span></text:p>
              </table:table-cell>
              <table:table-cell>
                <text:p text:style-name="P5"><text:span text:style-name="T30">3,017 tests · 88%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5" draw:style-name="gr49" draw:text-style-name="P6" draw:layer="layout" svg:width="30.733cm" svg:height="0.756cm" svg:x="1.524cm" svg:y="17.399cm">
          <text:p text:style-name="P5"><text:span text:style-name="T25">Two corpora · pre-registered methodology · Wilson CIs · external Bandit gate (non-tautological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Blank">
        <draw:custom-shape draw:name="TextBox 1" draw:style-name="gr50" draw:text-style-name="P6" draw:layer="layout" svg:width="30.733cm" svg:height="1.518cm" svg:x="1.524cm" svg:y="1.067cm">
          <text:p text:style-name="P5"><text:span text:style-name="T14">Why You Can Trust the Nu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2" draw:text-style-name="P14" draw:layer="layout" svg:width="0.405cm" svg:height="3.555cm" svg:x="1.778cm" svg:y="4.82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1" draw:text-style-name="P6" draw:layer="layout" svg:width="28.955cm" svg:height="1.772cm" svg:x="2.667cm" svg:y="4.826cm">
          <text:p text:style-name="P5"><text:span text:style-name="T31">We separated detection from trust</text:span></text:p>
          <text:p text:style-name="P5"><text:span text:style-name="T32">Most tools emit 30–70% false positives. The Confirmed Tier hits 96.4% — precise enough to auto-bloc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3" draw:text-style-name="P22" draw:layer="layout" svg:width="0.405cm" svg:height="3.555cm" svg:x="1.778cm" svg:y="8.94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2" draw:text-style-name="P6" draw:layer="layout" svg:width="28.955cm" svg:height="2.406cm" svg:x="2.667cm" svg:y="8.941cm">
          <text:p text:style-name="P5"><text:span text:style-name="T33">We don't claim a vulnerability — we detonate it</text:span></text:p>
          <text:p text:style-name="P5"><text:span text:style-name="T32">Real payloads in a Docker sandbox: SQLi ' OR 1=1, SSTI {{7*7}}→49, command injection. Verified live: exploits fire; safe code correctly does NO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" draw:text-style-name="P2" draw:layer="layout" svg:width="0.405cm" svg:height="3.555cm" svg:x="1.778cm" svg:y="13.0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3" draw:text-style-name="P6" draw:layer="layout" svg:width="28.955cm" svg:height="1.772cm" svg:x="2.667cm" svg:y="13.056cm">
          <text:p text:style-name="P5"><text:span text:style-name="T34">Every result is signed</text:span></text:p>
          <text:p text:style-name="P5"><text:span text:style-name="T32">ECDSA-P256 + Sigstore Rekor + SLSA L3. An auditor verifies the exact scan and result in one comman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draw:custom-shape draw:name="Rectangle 1" draw:style-name="gr1" draw:text-style-name="P2" draw:layer="layout" svg:width="33.865cm" svg:height="1.015cm" svg:x="0cm" svg:y="18.03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4" draw:text-style-name="P4" draw:layer="layout" svg:width="29.717cm" svg:height="3.043cm" svg:x="2.032cm" svg:y="7.112cm">
          <text:p text:style-name="P1"><text:span text:style-name="T35">Live Demo</text:span></text:p>
          <text:p text:style-name="P1"><text:span text:style-name="T36">Real repos · real findings · real explo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Blank">
        <draw:custom-shape draw:name="TextBox 1" draw:style-name="gr55" draw:text-style-name="P6" draw:layer="layout" svg:width="30.733cm" svg:height="1.518cm" svg:x="1.524cm" svg:y="1.067cm">
          <text:p text:style-name="P5"><text:span text:style-name="T14">Run Detail — payments-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6" draw:text-style-name="P6" draw:layer="layout" svg:width="30.479cm" svg:height="0.841cm" svg:x="1.575cm" svg:y="3.404cm">
          <text:p text:style-name="P5"><text:span text:style-name="T17">64 findings · 13 HIGH · real SQL injection, eval, hardcoded secr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8" draw:text-style-name="P19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39972646A3A24F91.png" xlink:type="simple" xlink:show="embed" xlink:actuate="onLoad" draw:mime-type="image/png">
            <text:p/>
          </draw:image>
          <svg:desc>run-detail.png</svg:desc>
        </draw:frame>
        <draw:custom-shape draw:name="TextBox 6" draw:style-name="gr57" draw:text-style-name="P6" draw:layer="layout" svg:width="30.733cm" svg:height="0.756cm" svg:x="1.524cm" svg:y="17.653cm">
          <text:p text:style-name="P5"><text:span text:style-name="T25">Every finding carries a canonical rule, severity, and a confidence score; the tabs expose compliance, attestation, and PR ris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Blank">
        <draw:custom-shape draw:name="TextBox 1" draw:style-name="gr58" draw:text-style-name="P6" draw:layer="layout" svg:width="30.733cm" svg:height="1.518cm" svg:x="1.524cm" svg:y="1.067cm">
          <text:p text:style-name="P5"><text:span text:style-name="T14">OWASP Top 10 Cove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9" draw:text-style-name="P6" draw:layer="layout" svg:width="30.479cm" svg:height="0.841cm" svg:x="1.575cm" svg:y="3.404cm">
          <text:p text:style-name="P5"><text:span text:style-name="T17">Real per-category counts for this scan — A03 Injection: 8, A02: 3 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8" draw:text-style-name="P19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9B13F9416310CB96.png" xlink:type="simple" xlink:show="embed" xlink:actuate="onLoad" draw:mime-type="image/png">
            <text:p/>
          </draw:image>
          <svg:desc>compliance.png</svg:desc>
        </draw:frame>
        <draw:custom-shape draw:name="TextBox 6" draw:style-name="gr60" draw:text-style-name="P6" draw:layer="layout" svg:width="30.733cm" svg:height="0.756cm" svg:x="1.524cm" svg:y="17.653cm">
          <text:p text:style-name="P5"><text:span text:style-name="T25">Compliance score derived from passed categories. On mature packages (numpy, pandas) ACR-QA reports 0 HIGH — 0.0% false-positive ra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Blank">
        <draw:custom-shape draw:name="TextBox 1" draw:style-name="gr61" draw:text-style-name="P6" draw:layer="layout" svg:width="30.733cm" svg:height="1.518cm" svg:x="1.524cm" svg:y="1.067cm">
          <text:p text:style-name="P5"><text:span text:style-name="T14">Cryptographic Attes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2" draw:text-style-name="P6" draw:layer="layout" svg:width="30.479cm" svg:height="0.841cm" svg:x="1.575cm" svg:y="3.404cm">
          <text:p text:style-name="P5"><text:span text:style-name="T17">Every scan ECDSA-P256 + post-quantum (Dilithium3) signed — Signature Verifi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8" draw:text-style-name="P19" draw:layer="layout" svg:width="28.853cm" svg:height="18.09cm" svg:x="2.464cm" svg:y="4.87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8.701cm" svg:height="17.938cm" svg:x="2.54cm" svg:y="4.953cm">
          <draw:image xlink:href="Pictures/1000000000000B4000000708696B7B98C1B217B9.png" xlink:type="simple" xlink:show="embed" xlink:actuate="onLoad" draw:mime-type="image/png">
            <text:p/>
          </draw:image>
          <svg:desc>attestation.png</svg:desc>
        </draw:frame>
        <draw:custom-shape draw:name="TextBox 6" draw:style-name="gr63" draw:text-style-name="P6" draw:layer="layout" svg:width="30.733cm" svg:height="0.756cm" svg:x="1.524cm" svg:y="17.653cm">
          <text:p text:style-name="P5"><text:span text:style-name="T25">Tamper-evident provenance: alter any finding and verification fails. An auditor confirms the exact scan and result in one comman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Blank">
        <draw:custom-shape draw:name="TextBox 1" draw:style-name="gr64" draw:text-style-name="P6" draw:layer="layout" svg:width="30.733cm" svg:height="1.518cm" svg:x="1.524cm" svg:y="1.067cm">
          <text:p text:style-name="P5"><text:span text:style-name="T14">Competitive Pos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5" draw:text-style-name="P6" draw:layer="layout" svg:width="30.479cm" svg:height="0.841cm" svg:x="1.575cm" svg:y="3.404cm">
          <text:p text:style-name="P5"><text:span text:style-name="T17">The one quadrant the market leaves open: open-source, first-party, in-CI, attested, at $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30.479cm" svg:height="10.158cm" svg:x="1.778cm" svg:y="5.08cm">
          <table:table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2" table:default-cell-style-name="ce1">
              <table:table-cell>
                <text:p text:style-name="P5"><text:span text:style-name="T37">Capability</text:span></text:p>
              </table:table-cell>
              <table:table-cell>
                <text:p text:style-name="P1"><text:span text:style-name="T37">Snyk</text:span></text:p>
              </table:table-cell>
              <table:table-cell>
                <text:p text:style-name="P1"><text:span text:style-name="T37">Semgrep</text:span></text:p>
              </table:table-cell>
              <table:table-cell>
                <text:p text:style-name="P1"><text:span text:style-name="T37">GHAS</text:span></text:p>
              </table:table-cell>
              <table:table-cell>
                <text:p text:style-name="P1"><text:span text:style-name="T38">ACR-QA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19">Exploit verification (Docker)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 table:style-name="ce4">
                <text:p text:style-name="P1"><text:span text:style-name="T30">✓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9">Re-exploit to verify the fix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 table:style-name="ce4">
                <text:p text:style-name="P1"><text:span text:style-name="T30">✓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19">Cryptographic attestation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 table:style-name="ce4">
                <text:p text:style-name="P1"><text:span text:style-name="T30">✓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9">Confirmed Tier (auto-block)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 table:style-name="ce4">
                <text:p text:style-name="P1"><text:span text:style-name="T30">✓ </text:span><text:span text:style-name="T30">96.4%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9">Self-hosted / $0 recurring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>
                <text:p text:style-name="P1"><text:span text:style-name="T39">✗</text:span></text:p>
              </table:table-cell>
              <table:table-cell table:style-name="ce4">
                <text:p text:style-name="P1"><text:span text:style-name="T30">✓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Blank">
        <draw:custom-shape draw:name="TextBox 1" draw:style-name="gr66" draw:text-style-name="P6" draw:layer="layout" svg:width="30.733cm" svg:height="1.518cm" svg:x="1.524cm" svg:y="1.067cm">
          <text:p text:style-name="P5"><text:span text:style-name="T14">Implementation 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7" draw:text-style-name="P12" draw:layer="layout" svg:width="30.479cm" svg:height="5.257cm" svg:x="1.778cm" svg:y="4.699cm">
          <text:p text:style-name="P11"><text:span text:style-name="T23">● <text:s/></text:span><text:span text:style-name="T23">19 analysis engines across detection, scoring, RAG, reachability, taint, attestation</text:span></text:p>
          <text:p text:style-name="P11"><text:span text:style-name="T15">● <text:s/></text:span><text:span text:style-name="T15">52-endpoint FastAPI service + React 18 / TypeScript dashboard (live SSE progress)</text:span></text:p>
          <text:p text:style-name="P11"><text:span text:style-name="T15">● <text:s/></text:span><text:span text:style-name="T15">3,017 tests · 88% CORE coverage; Docker Compose, Helm, Terraform, K8s operator</text:span></text:p>
          <text:p text:style-name="P11"><text:span text:style-name="T15">● <text:s/></text:span><text:span text:style-name="T15">Exploit verification across 13 categories; CBoM with NIST PQC classification</text:span></text:p>
          <text:p text:style-name="P11"><text:span text:style-name="T16">● <text:s/></text:span><text:span text:style-name="T16">Shipped as acrqa==5.0.0rc2 — self-hosted, zero recurring c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>
        <draw:custom-shape draw:name="TextBox 1" draw:style-name="gr68" draw:text-style-name="P6" draw:layer="layout" svg:width="29.209cm" svg:height="1.603cm" svg:x="2.286cm" svg:y="2.54cm">
          <text:p text:style-name="P5"><text:span text:style-name="T40">What ACR-QA Deliv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2.337cm" svg:y="4.69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1" draw:text-style-name="P2" draw:layer="layout" svg:width="4.317cm" svg:height="1.777cm" svg:x="2.413cm" svg:y="5.84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4" draw:style-name="gr69" draw:text-style-name="P4" draw:layer="layout" svg:width="4.317cm" svg:height="0.968cm" svg:x="2.413cm" svg:y="6.271cm">
          <text:p text:style-name="P1"><text:span text:style-name="T41">T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0" draw:text-style-name="P6" draw:layer="layout" svg:width="24.383cm" svg:height="0.968cm" svg:x="7.366cm" svg:y="6.348cm">
          <text:p text:style-name="P5"><text:span text:style-name="T42">96.4% Confirmed-Tier precision — high enough to auto-block a me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1" draw:text-style-name="P2" draw:layer="layout" svg:width="4.317cm" svg:height="1.777cm" svg:x="2.413cm" svg:y="8.179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7" draw:style-name="gr71" draw:text-style-name="P4" draw:layer="layout" svg:width="4.317cm" svg:height="0.968cm" svg:x="2.413cm" svg:y="8.608cm">
          <text:p text:style-name="P1"><text:span text:style-name="T41">Proo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2" draw:text-style-name="P6" draw:layer="layout" svg:width="24.383cm" svg:height="0.968cm" svg:x="7.366cm" svg:y="8.684cm">
          <text:p text:style-name="P5"><text:span text:style-name="T42">Exploit-verified in a sandbox + cryptographically signed — not gue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1" draw:text-style-name="P2" draw:layer="layout" svg:width="4.317cm" svg:height="1.777cm" svg:x="2.413cm" svg:y="10.51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" draw:style-name="gr73" draw:text-style-name="P4" draw:layer="layout" svg:width="4.317cm" svg:height="0.968cm" svg:x="2.413cm" svg:y="10.945cm">
          <text:p text:style-name="P1"><text:span text:style-name="T41">Re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4" draw:text-style-name="P6" draw:layer="layout" svg:width="24.383cm" svg:height="0.968cm" svg:x="7.366cm" svg:y="11.021cm">
          <text:p text:style-name="P5"><text:span text:style-name="T42">19 engines · Python / JS / Go · 9/10 OWASP · 100% CVE re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1" draw:text-style-name="P2" draw:layer="layout" svg:width="4.317cm" svg:height="1.777cm" svg:x="2.413cm" svg:y="12.85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3" draw:style-name="gr75" draw:text-style-name="P4" draw:layer="layout" svg:width="4.317cm" svg:height="0.968cm" svg:x="2.413cm" svg:y="13.282cm">
          <text:p text:style-name="P1"><text:span text:style-name="T41">Pr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6" draw:text-style-name="P6" draw:layer="layout" svg:width="24.383cm" svg:height="0.968cm" svg:x="7.366cm" svg:y="13.358cm">
          <text:p text:style-name="P5"><text:span text:style-name="T42">Self-hosted, your data never leaves, $0 recurring — vs $10–50k/y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7" draw:text-style-name="P6" draw:layer="layout" svg:width="29.209cm" svg:height="0.925cm" svg:x="2.413cm" svg:y="16.002cm">
          <text:p text:style-name="P5"><text:span text:style-name="T43">Detection you can trust, exploit-proof you can verify, a signed record of all of it — on any machine, at zero cos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Blank">
        <draw:custom-shape draw:name="TextBox 1" draw:style-name="gr78" draw:text-style-name="P6" draw:layer="layout" svg:width="30.733cm" svg:height="1.518cm" svg:x="1.524cm" svg:y="1.067cm">
          <text:p text:style-name="P5"><text:span text:style-name="T14">Future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4.317cm" svg:height="0.14cm" svg:x="1.575cm" svg:y="3.2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9" draw:text-style-name="P12" draw:layer="layout" svg:width="30.479cm" svg:height="4.206cm" svg:x="1.778cm" svg:y="4.699cm">
          <text:p text:style-name="P11"><text:span text:style-name="T15">● <text:s/></text:span><text:span text:style-name="T15">Inter-procedural taint analysis — est. +10–15pp injection-class recall</text:span></text:p>
          <text:p text:style-name="P11"><text:span text:style-name="T15">● <text:s/></text:span><text:span text:style-name="T15">Automatic pull-request generation via the GitHub API</text:span></text:p>
          <text:p text:style-name="P11"><text:span text:style-name="T15">● <text:s/></text:span><text:span text:style-name="T15">PHP / Java / Rust dedicated adapters; parallel exploit-sandbox scale-out</text:span></text:p>
          <text:p text:style-name="P11"><text:span text:style-name="T23">● <text:s/></text:span><text:span text:style-name="T23">Open-core path: free scanner + hosted compliance-evidence tier (EU CRA, SOC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>
        <draw:custom-shape draw:name="Rectangle 1" draw:style-name="gr1" draw:text-style-name="P2" draw:layer="layout" svg:width="33.865cm" svg:height="1.015cm" svg:x="0cm" svg:y="18.03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0" draw:text-style-name="P4" draw:layer="layout" svg:width="29.717cm" svg:height="3.043cm" svg:x="2.032cm" svg:y="7.112cm">
          <text:p text:style-name="P1"><text:span text:style-name="T35">Thank You</text:span></text:p>
          <text:p text:style-name="P1"><text:span text:style-name="T36">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 text:style-name="MP7"><presentation:footer/></text:p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dc:creator>Steve Canny</dc:creator>
    <meta:editing-cycles>1</meta:editing-cycles>
    <meta:creation-date>2013-01-27T09:14:16</meta:creation-date>
    <dc:date>2013-01-27T09:15:58</dc:date>
    <meta:editing-duration>PT1M</meta:editing-duration>
    <meta:generator>LibreOffice/7.3.7.2$Linux_X86_64 LibreOffice_project/30$Build-2</meta:generator>
    <meta:document-statistic meta:object-count="181"/>
    <meta:user-defined meta:name="AppVersion">14.0000</meta:user-defined>
    <meta:user-defined meta:name="PresentationFormat">On-screen Show (4:3)</meta:user-defined>
  </office:meta>
</office:document-meta>
</file>